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PT Astra Serif" svg:font-family="'PT Ast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Таблица3" style:family="table">
      <style:table-properties style:width="16cm" fo:margin-left="0cm" table:align="left"/>
    </style:style>
    <style:style style:name="Таблица3.A" style:family="table-column">
      <style:table-column-properties style:column-width="1.499cm"/>
    </style:style>
    <style:style style:name="Таблица3.B" style:family="table-column">
      <style:table-column-properties style:column-width="4.6cm"/>
    </style:style>
    <style:style style:name="Таблица3.C" style:family="table-column">
      <style:table-column-properties style:column-width="3.6cm"/>
    </style:style>
    <style:style style:name="Таблица3.D" style:family="table-column">
      <style:table-column-properties style:column-width="3cm"/>
    </style:style>
    <style:style style:name="Таблица3.E" style:family="table-column">
      <style:table-column-properties style:column-width="3.3cm"/>
    </style:style>
    <style:style style:name="Таблица3.A1" style:family="table-cell">
      <style:table-cell-properties fo:padding-left="0.109cm" fo:padding-right="0.109cm" fo:padding-top="0.18cm" fo:padding-bottom="0.18cm" fo:border="0.5pt solid #000000" style:writing-mode="lr-tb"/>
    </style:style>
    <style:style style:name="Таблица4" style:family="table">
      <style:table-properties style:width="15.947cm" fo:margin-left="0cm" table:align="left"/>
    </style:style>
    <style:style style:name="Таблица4.A" style:family="table-column">
      <style:table-column-properties style:column-width="1.288cm"/>
    </style:style>
    <style:style style:name="Таблица4.B" style:family="table-column">
      <style:table-column-properties style:column-width="2.499cm"/>
    </style:style>
    <style:style style:name="Таблица4.C" style:family="table-column">
      <style:table-column-properties style:column-width="2.9cm"/>
    </style:style>
    <style:style style:name="Таблица4.D" style:family="table-column">
      <style:table-column-properties style:column-width="3.26cm"/>
    </style:style>
    <style:style style:name="Таблица4.E" style:family="table-column">
      <style:table-column-properties style:column-width="3.401cm"/>
    </style:style>
    <style:style style:name="Таблица4.F" style:family="table-column">
      <style:table-column-properties style:column-width="2.6cm"/>
    </style:style>
    <style:style style:name="Таблица4.A1" style:family="table-cell">
      <style:table-cell-properties fo:padding-left="0.109cm" fo:padding-right="0.109cm" fo:padding-top="0.18cm" fo:padding-bottom="0.18cm" fo:border="0.5pt solid #000000" style:writing-mode="lr-tb"/>
    </style:style>
    <style:style style:name="Таблица5" style:family="table">
      <style:table-properties style:width="15.977cm" fo:margin-left="0cm" table:align="left"/>
    </style:style>
    <style:style style:name="Таблица5.A" style:family="table-column">
      <style:table-column-properties style:column-width="1cm"/>
    </style:style>
    <style:style style:name="Таблица5.B" style:family="table-column">
      <style:table-column-properties style:column-width="4.001cm"/>
    </style:style>
    <style:style style:name="Таблица5.C" style:family="table-column">
      <style:table-column-properties style:column-width="3.776cm"/>
    </style:style>
    <style:style style:name="Таблица5.D" style:family="table-column">
      <style:table-column-properties style:column-width="3.2cm"/>
    </style:style>
    <style:style style:name="Таблица5.A1" style:family="table-cell">
      <style:table-cell-properties fo:padding-left="0.109cm" fo:padding-right="0.109cm" fo:padding-top="0.18cm" fo:padding-bottom="0.18cm" fo:border="0.5pt solid #000000" style:writing-mode="lr-tb"/>
    </style:style>
    <style:style style:name="Таблица6" style:family="table">
      <style:table-properties style:width="15.97cm" fo:margin-left="0cm" table:align="left"/>
    </style:style>
    <style:style style:name="Таблица6.A" style:family="table-column">
      <style:table-column-properties style:column-width="0.956cm"/>
    </style:style>
    <style:style style:name="Таблица6.B" style:family="table-column">
      <style:table-column-properties style:column-width="4.701cm"/>
    </style:style>
    <style:style style:name="Таблица6.C" style:family="table-column">
      <style:table-column-properties style:column-width="3.514cm"/>
    </style:style>
    <style:style style:name="Таблица6.D" style:family="table-column">
      <style:table-column-properties style:column-width="3.2cm"/>
    </style:style>
    <style:style style:name="Таблица6.E" style:family="table-column">
      <style:table-column-properties style:column-width="3.6cm"/>
    </style:style>
    <style:style style:name="Таблица6.A1" style:family="table-cell">
      <style:table-cell-properties fo:padding-left="0.109cm" fo:padding-right="0.109cm" fo:padding-top="0.18cm" fo:padding-bottom="0.18cm" fo:border="0.5pt solid #000000" style:writing-mode="lr-tb"/>
    </style:style>
    <style:style style:name="Таблица7" style:family="table">
      <style:table-properties style:width="15.951cm" fo:margin-left="0cm" table:align="left"/>
    </style:style>
    <style:style style:name="Таблица7.A" style:family="table-column">
      <style:table-column-properties style:column-width="0.914cm"/>
    </style:style>
    <style:style style:name="Таблица7.B" style:family="table-column">
      <style:table-column-properties style:column-width="5.724cm"/>
    </style:style>
    <style:style style:name="Таблица7.C" style:family="table-column">
      <style:table-column-properties style:column-width="3.514cm"/>
    </style:style>
    <style:style style:name="Таблица7.D" style:family="table-column">
      <style:table-column-properties style:column-width="2.799cm"/>
    </style:style>
    <style:style style:name="Таблица7.E" style:family="table-column">
      <style:table-column-properties style:column-width="3cm"/>
    </style:style>
    <style:style style:name="Таблица7.A1" style:family="table-cell">
      <style:table-cell-properties fo:padding-left="0.109cm" fo:padding-right="0.109cm" fo:padding-top="0.18cm" fo:padding-bottom="0.18cm" fo:border="0.5pt solid #000000" style:writing-mode="lr-tb"/>
    </style:style>
    <style:style style:name="Таблица8" style:family="table">
      <style:table-properties style:width="16cm" fo:margin-left="0cm" table:align="left"/>
    </style:style>
    <style:style style:name="Таблица8.A" style:family="table-column">
      <style:table-column-properties style:column-width="1.3cm"/>
    </style:style>
    <style:style style:name="Таблица8.B" style:family="table-column">
      <style:table-column-properties style:column-width="6.6cm"/>
    </style:style>
    <style:style style:name="Таблица8.C" style:family="table-column">
      <style:table-column-properties style:column-width="8.1cm"/>
    </style:style>
    <style:style style:name="Таблица8.A1" style:family="table-cell">
      <style:table-cell-properties fo:padding-left="0.109cm" fo:padding-right="0.109cm" fo:padding-top="0.18cm" fo:padding-bottom="0.18cm" fo:border="0.5pt solid #000000" style:writing-mode="lr-tb"/>
    </style:style>
    <style:style style:name="Таблица9" style:family="table">
      <style:table-properties style:width="15.933cm" fo:margin-left="0cm" table:align="left"/>
    </style:style>
    <style:style style:name="Таблица9.A" style:family="table-column">
      <style:table-column-properties style:column-width="1.134cm"/>
    </style:style>
    <style:style style:name="Таблица9.B" style:family="table-column">
      <style:table-column-properties style:column-width="2.499cm"/>
    </style:style>
    <style:style style:name="Таблица9.C" style:family="table-column">
      <style:table-column-properties style:column-width="3.3cm"/>
    </style:style>
    <style:style style:name="Таблица9.D" style:family="table-column">
      <style:table-column-properties style:column-width="2.9cm"/>
    </style:style>
    <style:style style:name="Таблица9.F" style:family="table-column">
      <style:table-column-properties style:column-width="2.799cm"/>
    </style:style>
    <style:style style:name="Таблица9.A1" style:family="table-cell">
      <style:table-cell-properties fo:padding-left="0.109cm" fo:padding-right="0.109cm" fo:padding-top="0.18cm" fo:padding-bottom="0.18cm" fo:border="0.5pt solid #000000" style:writing-mode="lr-tb"/>
    </style:style>
    <style:style style:name="P1" style:family="paragraph" style:parent-style-name="ConsPlusNormal">
      <style:paragraph-properties fo:text-align="justify" style:justify-single-word="false"/>
    </style:style>
    <style:style style:name="P2" style:family="paragraph" style:parent-style-name="ConsPlusNormal">
      <style:paragraph-properties fo:text-align="center" style:justify-single-word="false"/>
    </style:style>
    <style:style style:name="P3" style:family="paragraph" style:parent-style-name="ConsPlusNormal">
      <style:text-properties fo:color="#000000" style:font-name="PT Astra Serif"/>
    </style:style>
    <style:style style:name="P4" style:family="paragraph" style:parent-style-name="ConsPlusNormal">
      <style:paragraph-properties fo:text-align="justify" style:justify-single-word="false"/>
      <style:text-properties fo:color="#000000" style:font-name="PT Astra Serif"/>
    </style:style>
    <style:style style:name="P5" style:family="paragraph" style:parent-style-name="ConsPlusNormal">
      <style:paragraph-properties fo:text-align="end" style:justify-single-word="false"/>
      <style:text-properties fo:color="#000000" style:font-name="PT Astra Serif"/>
    </style:style>
    <style:style style:name="P6" style:family="paragraph" style:parent-style-name="ConsPlusNormal">
      <style:paragraph-properties fo:text-align="center" style:justify-single-word="false"/>
      <style:text-properties fo:color="#000000" style:font-name="PT Astra Serif"/>
    </style:style>
    <style:style style:name="P7" style:family="paragraph" style:parent-style-name="ConsPlusNormal">
      <style:paragraph-properties fo:margin-left="0cm" fo:margin-right="0cm" fo:text-align="justify" style:justify-single-word="false" fo:text-indent="0.953cm" style:auto-text-indent="false"/>
    </style:style>
    <style:style style:name="P8" style:family="paragraph" style:parent-style-name="ConsPlusNormal">
      <style:paragraph-properties fo:margin-left="0cm" fo:margin-right="0cm" fo:text-align="justify" style:justify-single-word="false" fo:text-indent="0.953cm" style:auto-text-indent="false"/>
      <style:text-properties fo:color="#000000" style:font-name="PT Astra Serif"/>
    </style:style>
    <style:style style:name="P9" style:family="paragraph" style:parent-style-name="ConsPlusNormal">
      <style:paragraph-properties fo:margin-left="0cm" fo:margin-right="0cm" fo:margin-top="0.353cm" fo:margin-bottom="0cm" loext:contextual-spacing="false" fo:text-align="justify" style:justify-single-word="false" fo:text-indent="0.953cm" style:auto-text-indent="false"/>
    </style:style>
    <style:style style:name="P10" style:family="paragraph" style:parent-style-name="ConsPlusNormal">
      <style:paragraph-properties fo:margin-left="0cm" fo:margin-right="0cm" fo:margin-top="0.353cm" fo:margin-bottom="0cm" loext:contextual-spacing="false" fo:text-align="justify" style:justify-single-word="false" fo:text-indent="0.953cm" style:auto-text-indent="false"/>
      <style:text-properties fo:color="#000000" style:font-name="PT Astra Serif"/>
    </style:style>
    <style:style style:name="P11" style:family="paragraph" style:parent-style-name="ConsPlusNormal">
      <style:paragraph-properties fo:margin-left="0cm" fo:margin-right="0cm" fo:margin-top="0.459cm" fo:margin-bottom="0cm" loext:contextual-spacing="false" fo:text-align="justify" style:justify-single-word="false" fo:text-indent="0.953cm" style:auto-text-indent="false"/>
    </style:style>
    <style:style style:name="P12" style:family="paragraph" style:parent-style-name="ConsPlusNormal">
      <style:paragraph-properties fo:margin-left="0cm" fo:margin-right="0cm" fo:margin-top="0.459cm" fo:margin-bottom="0cm" loext:contextual-spacing="false" fo:text-align="justify" style:justify-single-word="false" fo:text-indent="0.953cm" style:auto-text-indent="false"/>
      <style:text-properties fo:color="#000000" style:font-name="PT Astra Serif"/>
    </style:style>
    <style:style style:name="P13" style:family="paragraph" style:parent-style-name="ConsPlusNonformat">
      <style:paragraph-properties fo:text-align="justify" style:justify-single-word="false"/>
    </style:style>
    <style:style style:name="P14" style:family="paragraph" style:parent-style-name="ConsPlusNonformat">
      <style:paragraph-properties fo:text-align="justify" style:justify-single-word="false"/>
      <style:text-properties fo:color="#000000" style:font-name="PT Astra Serif"/>
    </style:style>
    <style:style style:name="P15" style:family="paragraph" style:parent-style-name="ConsPlusTitle">
      <style:paragraph-properties fo:text-align="center" style:justify-single-word="false"/>
      <style:text-properties fo:color="#000000" style:font-name="PT Astra Serif"/>
    </style:style>
    <style:style style:name="P16" style:family="paragraph" style:parent-style-name="ConsPlusTitle">
      <style:paragraph-properties fo:text-align="justify" style:justify-single-word="false"/>
      <style:text-properties fo:color="#000000" style:font-name="PT Astra Serif"/>
    </style:style>
    <style:style style:name="P17" style:family="paragraph" style:parent-style-name="ConsPlusNormal">
      <style:paragraph-properties fo:margin-top="0.176cm" fo:margin-bottom="0.176cm" loext:contextual-spacing="false" fo:text-align="justify" style:justify-single-word="false" fo:padding="0cm" fo:border-left="none" fo:border-right="none" fo:border-top="none" fo:border-bottom="0.74pt solid #000000" style:shadow="none"/>
      <style:text-properties fo:color="#000000" style:font-name="PT Astra Serif" fo:font-size="1pt" style:font-size-asian="1pt" style:font-size-complex="1pt"/>
    </style:style>
    <style:style style:name="P18" style:family="paragraph" style:parent-style-name="ConsPlusTitle">
      <style:paragraph-properties fo:text-align="center" style:justify-single-word="false"/>
      <style:text-properties fo:color="#000000" style:font-name="PT Astra Serif"/>
    </style:style>
    <style:style style:name="P19" style:family="paragraph" style:parent-style-name="ConsPlusNormal" style:master-page-name="MPF0">
      <style:paragraph-properties fo:text-align="justify" style:justify-single-word="false" style:page-number="auto" fo:break-before="page"/>
      <style:text-properties fo:color="#000000" style:font-name="PT Astra Serif"/>
    </style:style>
    <style:style style:name="P20" style:family="paragraph" style:parent-style-name="ConsPlusNormal">
      <style:text-properties fo:color="#000000" style:font-name="PT Astra Serif"/>
    </style:style>
    <style:style style:name="P21" style:family="paragraph" style:parent-style-name="ConsPlusNormal">
      <style:paragraph-properties fo:text-align="end" style:justify-single-word="false"/>
      <style:text-properties fo:color="#000000" style:font-name="PT Astra Serif"/>
    </style:style>
    <style:style style:name="P22" style:family="paragraph" style:parent-style-name="ConsPlusNormal">
      <style:paragraph-properties fo:text-align="end" style:justify-single-word="false"/>
      <style:text-properties fo:color="#000000" style:font-name="PT Astra Serif"/>
    </style:style>
    <style:style style:name="T1" style:family="text">
      <style:text-properties fo:color="#000000" style:font-name="PT Astra Serif"/>
    </style:style>
    <style:style style:name="T2" style:family="text">
      <style:text-properties fo:color="#000000" style:font-name="PT Astra Serif" fo:language="none" fo:country="none" officeooo:rsid="000eb574"/>
    </style:style>
    <style:style style:name="T3" style:family="text">
      <style:text-properties fo:color="#000000" style:font-name="PT Astra Serif" officeooo:rsid="000fb8f7"/>
    </style:style>
    <style:style style:name="T4" style:family="text">
      <style:text-properties officeooo:rsid="000e113d"/>
    </style:style>
    <style:style style:name="T5" style:family="text">
      <style:text-properties officeooo:rsid="000fb8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h text:style-name="P20" text:outline-level="1">Зарегистрировано в Минюсте России 10 августа 2021 г. N 64589</text:h>
      <text:p text:style-name="P17"/>
      <text:p text:style-name="P4"/>
      <text:p text:style-name="P15">ФЕДЕРАЛЬНАЯ СЛУЖБА ПО ТЕХНИЧЕСКОМУ И ЭКСПОРТНОМУ КОНТРОЛЮ</text:p>
      <text:p text:style-name="P16"/>
      <text:p text:style-name="P15">ПРИКАЗ</text:p>
      <text:p text:style-name="P15">от 29 апреля 2021 г. N 77</text:p>
      <text:p text:style-name="P16"/>
      <text:p text:style-name="P15">ОБ УТВЕРЖДЕНИИ ПОРЯДКА</text:p>
      <text:p text:style-name="P15">ОРГАНИЗАЦИИ И ПРОВЕДЕНИЯ РАБОТ ПО АТТЕСТАЦИИ ОБЪЕКТОВ</text:p>
      <text:p text:style-name="P15">ИНФОРМАТИЗАЦИИ НА СООТВЕТСТВИЕ ТРЕБОВАНИЯМ О ЗАЩИТЕ</text:p>
      <text:p text:style-name="P15">ИНФОРМАЦИИ ОГРАНИЧЕННОГО ДОСТУПА, НЕ СОСТАВЛЯЮЩЕЙ</text:p>
      <text:p text:style-name="P15">ГОСУДАРСТВЕННУЮ ТАЙНУ</text:p>
      <text:p text:style-name="P4"/>
      <text:p text:style-name="P7"><text:span text:style-name="T1">В соответствии с </text:span><text:span text:style-name="Основной_20_шрифт_20_абзаца"><text:span text:style-name="T1">подпунктом 13.3 пункта 8</text:span></text:span><text:span text:style-name="T1"> Положения о Федеральной службе по техническому и экспортному контролю, утвержденного Указом Президента Российской Федерации от 16 августа 2004 г. N 1085 (Собрание законодательства Российской Федерации, 2004, N 34, ст. 3541; 2020, N 35, ст. 5554), приказываю:</text:span></text:p>
      <text:p text:style-name="P9"><text:span text:style-name="T1">1. Утвердить прилагаемый </text:span><text:span text:style-name="Основной_20_шрифт_20_абзаца"><text:span text:style-name="T1">Порядок</text:span></text:span><text:span text:style-name="T1"> организации и проведения работ по аттестации объектов информатизации на соответствие требованиям о защите информации ограниченного доступа, не составляющей государственную тайну.</text:span></text:p>
      <text:p text:style-name="P10">2. Установить, что настоящий приказ вступает в силу с 1 сентября 2021 г.</text:p>
      <text:p text:style-name="P4"/>
      <text:p text:style-name="P5">Директор Федеральной</text:p>
      <text:p text:style-name="P5">службы по техническому</text:p>
      <text:p text:style-name="P5">и экспортному контролю</text:p>
      <text:p text:style-name="P5">В.СЕЛИН</text:p>
      <text:p text:style-name="P4"/>
      <text:p text:style-name="P4"/>
      <text:p text:style-name="P4"/>
      <text:p text:style-name="P4"/>
      <text:p text:style-name="P4"/>
      <text:h text:style-name="P21" text:outline-level="1">Утвержден</text:h>
      <text:p text:style-name="P5">приказом ФСТЭК России</text:p>
      <text:p text:style-name="P5">от 29 апреля 2021 г. N 77</text:p>
      <text:p text:style-name="P4"/>
      <text:p text:style-name="P15"><text:bookmark text:name="P32"/>ПОРЯДОК</text:p>
      <text:p text:style-name="P15">ОРГАНИЗАЦИИ И ПРОВЕДЕНИЯ РАБОТ ПО АТТЕСТАЦИИ ОБЪЕКТОВ</text:p>
      <text:p text:style-name="P15">ИНФОРМАТИЗАЦИИ НА СООТВЕТСТВИЕ ТРЕБОВАНИЯМ О ЗАЩИТЕ</text:p>
      <text:p text:style-name="P15">ИНФОРМАЦИИ ОГРАНИЧЕННОГО ДОСТУПА, НЕ СОСТАВЛЯЮЩЕЙ</text:p>
      <text:p text:style-name="P15">ГОСУДАРСТВЕННУЮ ТАЙНУ</text:p>
      <text:p text:style-name="P4"/>
      <text:h text:style-name="P18" text:outline-level="2">I. Общие положения</text:h>
      <text:p text:style-name="P4"/>
      <text:p text:style-name="P8">1. Настоящий Порядок определяет состав и содержание работ по аттестации объектов информатизации на соответствие требованиям о защите информации ограниченного доступа, не составляющей государственную тайну (далее - требования по защите информации) &lt;1&gt;, а также требования к форме и содержанию разрабатываемых при организации и проведении таких работ документов.</text:p>
      <text:p text:style-name="P10">--------------------------------</text:p>
      <text:p text:style-name="P9"><text:span text:style-name="T1">&lt;1&gt; </text:span><text:span text:style-name="Основной_20_шрифт_20_абзаца"><text:span text:style-name="T1">Требования</text:span></text:span><text:span text:style-name="T1"> о защите информации, не составляющей государственную тайну, содержащейся в государственных информационных системах, утвержденные приказом ФСТЭК России от 11 февраля 2013 г. N 17 (зарегистрирован Минюстом России 31 мая 2013 г., регистрационный N 28608), с изменениями, внесенными приказом ФСТЭК России от 15 февраля 2017 г. N 27 (зарегистрирован Минюстом России 14 марта 2017 г., регистрационный N 45933), приказом ФСТЭК России от 28 мая 2019 г. N 106 (зарегистрирован Минюстом России 13 сентября 2019 г., регистрационный N 55924), приказом ФСТЭК России от 27 апреля 2020 г. N 61 (зарегистрирован Минюстом России 12 мая 2020 г., регистрационный N 58322).</text:span></text:p>
      <text:p text:style-name="P10">Требования к обеспечению защиты информации, содержащейся в информационных системах управления <text:soft-page-break/>производством, используемых предприятиями оборонно-промышленного комплекса, утвержденные приказом ФСТЭК России от 28 февраля 2017 г. N 31 (зарегистрирован Минюстом России 18 мая 2017 г., регистрационный N 46769), с изменениями, внесенными приказом ФСТЭК России от 14 января 2019 г. N 5 (зарегистрирован Минюстом России 27 февраля 2019 г., регистрационный N 53916), приказом ФСТЭК России от 28 октября 2020 г. N 122 (зарегистрирован Минюстом России 25 марта 2021 г., регистрационный N 62868).</text:p>
      <text:p text:style-name="P9"><text:span text:style-name="Основной_20_шрифт_20_абзаца"><text:span text:style-name="T1">Требования</text:span></text:span><text:span text:style-name="T1"> по обеспечению безопасности значимых объектов критической информационной инфраструктуры Российской Федерации, утвержденные приказом ФСТЭК России от 25 декабря 2017 г. N 239 (зарегистрирован Минюстом России 26 марта 2018 г., регистрационный N 50524), с изменениями, внесенными приказом ФСТЭК России от 9 августа 2018 г. N 138 (зарегистрирован Минюстом России 5 сентября 2018 г., регистрационный N 52071), приказом ФСТЭК России от 26 марта 2019 г. N 60 (зарегистрирован Минюстом России 18 апреля 2019 г., регистрационный N 54443), приказом ФСТЭК России от 20 февраля 2020 г. N 35 (зарегистрирован Минюстом России 11 сентября 2020 г., регистрационный N 59793).</text:span></text:p>
      <text:p text:style-name="P11"><text:span text:style-name="Основной_20_шрифт_20_абзаца"><text:span text:style-name="T1">Требования</text:span></text:span><text:span text:style-name="T1"> к обеспечению защиты информации в автоматизированных системах управления производственными процессами на критически важных объектах, потенциально опасных объектах, а также объектах, представляющих повышенную опасность для жизни и здоровья людей и для окружающей природной среды, утвержденные приказом ФСТЭК России от 14 марта 201</text:span><text:span text:style-name="T2">4</text:span><text:span text:style-name="T1"> г. N 31 (зарегистрирован Минюстом России 30 июня 2014 г., регистрационный N 46769), с изменениями, внесенными приказом ФСТЭК России от 23 марта 2017 г. N 49 (зарегистрирован Минюстом России 25 апреля 2017 г., регистрационный N 46487), приказом ФСТЭК России от 9 августа 2018 г. N 138 (зарегистрирован Минюстом России 5 сентября 2018 г., регистрационный N 52071).</text:span></text:p>
      <text:p text:style-name="P9"><text:span text:style-name="Основной_20_шрифт_20_абзаца"><text:span text:style-name="T1">Состав</text:span></text:span><text:span text:style-name="T1"> и содержание организационных и технических мер по обеспечению безопасности персональных данных при их обработке в информационных системах персональных данных, утвержденные приказом ФСТЭК России от 18 февраля 2013 г. N 21 (зарегистрирован Минюстом России 14 мая 2013 г., регистрационный N 28375), с изменениями, внесенными приказом ФСТЭК России от 23 марта 2017 г. N 49 (зарегистрирован Минюстом России 25 апреля 2017 г., регистрационный N 46487), приказом ФСТЭК России от 14 мая 2020 г. N 68 (зарегистрирован Минюстом России 8 июля 2020 г., регистрационный N 58877).</text:span></text:p>
      <text:p text:style-name="P10">Положение по защите информации при использовании оборудования с числовым программным управлением, предназначенного для обработки информации ограниченного доступа, не содержащей сведений, составляющих государственную тайну, утвержденные приказом ФСТЭК России от 29 мая 2009 г. N 191 (зарегистрирован Минюстом России 6 июля 2009 г., регистрационный N 14230).</text:p>
      <text:p text:style-name="P4"/>
      <text:p text:style-name="P8">2. Аттестация объектов информатизации осуществляется федеральными органами государственной власти, органами государственной власти субъектов Российской Федерации, органами местного самоуправления, организациями, которым на праве собственности или ином законном основании принадлежат объекты информатизации, а также лицами, заключившими контракт на создание объектов информатизации, или лицами, осуществляющими эксплуатацию объектов информатизации (далее - владельцы объектов информатизации).</text:p>
      <text:p text:style-name="P10">3. Настоящий Порядок распространяется на аттестацию на соответствие требованиям по защите информации (далее - аттестация) следующих объектов информатизации &lt;2&gt;:</text:p>
      <text:p text:style-name="P10">--------------------------------</text:p>
      <text:p text:style-name="P9"><text:span text:style-name="T1">&lt;2&gt; </text:span><text:span text:style-name="Основной_20_шрифт_20_абзаца"><text:span text:style-name="T1">Пункт 3.1</text:span></text:span><text:span text:style-name="T1"> Национального стандарта Российской Федерации ГОСТ Р 51275-2006 "Защита информации. Объект информатизации. Факторы, воздействующие на информацию. Общие положения", утвержденного и введенного в действие </text:span><text:span text:style-name="Основной_20_шрифт_20_абзаца"><text:span text:style-name="T1">приказом</text:span></text:span><text:span text:style-name="T1"> Ростехрегулирования от 27 декабря 2006 г. N 374-ст (Москва: Стандартинформ, 2007).</text:span></text:p>
      <text:p text:style-name="P4"/>
      <text:p text:style-name="P8">государственных и муниципальных информационных систем, в том числе государственных, муниципальных информационных систем персональных данных;</text:p>
      <text:p text:style-name="P10">информационных систем управления производством, используемых организациями оборонно-промышленного комплекса, в том числе автоматизированных систем станков с числовым программным управлением;</text:p>
      <text:p text:style-name="P10">помещений, предназначенных для ведения конфиденциальных переговоров (далее - защищаемые помещения) &lt;3&gt;.</text:p>
      <text:p text:style-name="P10">--------------------------------</text:p>
      <text:p text:style-name="P9"><text:soft-page-break/><text:span text:style-name="T1">&lt;3&gt; </text:span><text:span text:style-name="Основной_20_шрифт_20_абзаца"><text:span text:style-name="T1">Положение</text:span></text:span><text:span text:style-name="T1"> о лицензировании деятельности по технической защите конфиденциальной информации, утвержденное постановлением Правительства Российской Федерации от 3 февраля 2012 г. N 79 (Собрание законодательства Российской Федерации, 2012, N 7, ст. 863; 2020, N 49, ст. 7943).</text:span></text:p>
      <text:p text:style-name="P4"/>
      <text:p text:style-name="P8">Настоящий Порядок применяется также для аттестации следующих объектов информатизации, для которых их владельцами установлено требование по проведению оценки соответствия систем защиты информации этих объектов требованиям по защите информации в форме аттестации:</text:p>
      <text:p text:style-name="P10">значимых объектов критической информационной инфраструктуры Российской Федерации;</text:p>
      <text:p text:style-name="P10">информационных систем персональных данных (за исключением государственных, муниципальных информационных систем персональных данных);</text:p>
      <text:p text:style-name="P10">автоматизированных систем управления производственными и технологическими процессами на критически важных объектах, потенциально опасных объектах, объектах, представляющих повышенную опасность для жизни и здоровья людей и для окружающей природной среды.</text:p>
      <text:p text:style-name="P10">4. Аттестация объекта информатизации проводится на этапе его создания или развития (модернизации) и предусматривает проведение комплекса организационных и технических мероприятий и работ (аттестационных испытаний), в результате которых подтверждается соответствие объекта информатизации требованиям по защите информации в условиях его эксплуатации. Допускается проведение аттестации объекта информатизации на этапе его эксплуатации в случае, если владельцем объекта принято решение об обработке защищаемой информации после ввода в эксплуатацию объекта информатизации.</text:p>
      <text:p text:style-name="P4"/>
      <text:h text:style-name="P18" text:outline-level="2">II. Организация работ по аттестации объектов информатизации</text:h>
      <text:p text:style-name="P4"/>
      <text:p text:style-name="P7"><text:span text:style-name="T1">5. Для проведения аттестационных испытаний владелец объекта информатизации привлекает организацию, имеющую лицензию на осуществление деятельности по технической защите конфиденциальной информации (с правом проведения работ и оказания услуг по аттестационным испытаниям и аттестации на соответствие требованиям по защите информации), выданную ФСТЭК России в соответствии с </text:span><text:span text:style-name="Основной_20_шрифт_20_абзаца"><text:span text:style-name="T1">Положением</text:span></text:span><text:span text:style-name="T1"> о лицензировании деятельности по технической защите конфиденциальной информации, утвержденным постановлением Правительства Российской Федерации от 3 февраля 2012 г. N 79 (далее - орган по аттестации).</text:span></text:p>
      <text:p text:style-name="P10">6. По решению руководителя федерального органа государственной власти, органа государственной власти субъекта Российской Федерации, органа местного самоуправления аттестация принадлежащих этому органу объектов информатизации проводится в соответствии с настоящим Порядком структурным подразделением (работниками) этого органа, ответственными за защиту информации, после информирования ФСТЭК России о принятом решении и при наличии необходимых для проведения работ по аттестации:</text:p>
      <text:p text:style-name="P10">а) средств, предназначенных для контроля эффективности защиты информации от несанкционированного доступа (для аттестации информационных, автоматизированных систем управления, информационно-телекоммуникационных сетей (далее - информационные (автоматизированные) системы), а также контрольно-измерительного, производственного и испытательного оборудования (для аттестации защищаемых помещений);</text:p>
      <text:p text:style-name="P9"><text:span text:style-name="T1">б) нормативных правовых актов и методических документов ФСТЭК России по вопросам технической защиты конфиденциальной информации, разработанных и утвержденных ФСТЭК России в соответствии с </text:span><text:span text:style-name="Основной_20_шрифт_20_абзаца"><text:span text:style-name="T1">подпунктом 4 пункта 8</text:span></text:span><text:span text:style-name="T1"> Положения о Федеральной службе по техническому и экспортному контролю, утвержденного Указом Президента Российской Федерации от 16 августа 2004 г. N 1085 (Собрание законодательства Российской Федерации, 2004, N 34, ст. 3541; 2020, N 35, ст. 5554), национальных стандартов в области технической защиты информации;</text:span></text:p>
      <text:p text:style-name="P10">в) работников, обладающих знаниями и навыками в области технической защиты конфиденциальной информации и аттестации объектов информатизации.</text:p>
      <text:p text:style-name="P10">7. Для проведения аттестационных испытаний органом по аттестации из числа своих работников назначается аттестационная комиссия в составе руководителя комиссии и не менее двух экспертов, обладающих знаниями и навыками в области технической защиты конфиденциальной информации и аттестации объектов информатизации (далее - эксперты органа по аттестации).</text:p>
      <text:p text:style-name="P10">8. При назначении экспертов органа по аттестации должна быть обеспечена их независимость от владельца объекта информатизации с целью исключения возможности влияния владельца аттестуемого объекта информатизации на результаты аттестационных испытаний, проведенных экспертами органа по аттестации.</text:p>
      <text:p text:style-name="P10"><text:soft-page-break/>Назначение экспертов органов по аттестации из числа работников, участвующих в разработке и (или) внедрении системы защиты информации объекта информатизации, не допускается.</text:p>
      <text:p text:style-name="P9"><text:span text:style-name="T1">Эксперты органа по аттестации проводят анализ документов, представляемых владельцем объекта информатизации в соответствии с </text:span><text:span text:style-name="Основной_20_шрифт_20_абзаца"><text:span text:style-name="T1">пунктом 11</text:span></text:span><text:span text:style-name="T1"> настоящего Порядка, и аттестационные испытания объекта информатизации в соответствии с требованиями по технической защите информации.</text:span></text:p>
      <text:p text:style-name="P10">Выводы экспертов органа по аттестации по результатам проведенных аттестационных испытаний не должны противоречить требованиям по технической защите информации.</text:p>
      <text:p text:style-name="P10">9. Срок проведения работ по аттестации объекта информатизации устанавливается владельцем объекта информатизации по согласованию с органом по аттестации, но не может превышать четырех месяцев.</text:p>
      <text:p text:style-name="P9"><text:span text:style-name="T1">10. Информация об объекте информатизации, полученная органом по аттестации в ходе аттестации объекта информатизации, подлежит защите в соответствии с </text:span><text:span text:style-name="Основной_20_шрифт_20_абзаца"><text:span text:style-name="T1">частью 4 статьи 16</text:span></text:span><text:span text:style-name="T1"> Федерального закона от 27 июля 2006 г. N 149-ФЗ "Об информации, информационных технологиях и о защите информации" (Собрание законодательства Российской Федерации, 2006, N 31, ст. 3448, 2014, N 30, ст. 4243).</text:span></text:p>
      <text:p text:style-name="P4"/>
      <text:h text:style-name="P18" text:outline-level="2">III. Проведение работ по аттестации объектов информатизации</text:h>
      <text:p text:style-name="P4"/>
      <text:p text:style-name="P8"><text:bookmark text:name="P85"/>11. Для проведения работ по аттестации владелец объекта информатизации представляет в орган по аттестации следующие документы или их копии:</text:p>
      <text:p text:style-name="P9"><text:span text:style-name="T1">а) технический паспорт на объект информатизации по форме согласно </text:span><text:span text:style-name="Основной_20_шрифт_20_абзаца"><text:span text:style-name="T1">приложениям N 1</text:span></text:span><text:span text:style-name="T1">, </text:span><text:span text:style-name="Основной_20_шрифт_20_абзаца"><text:span text:style-name="T1">2</text:span></text:span><text:span text:style-name="T1"> к настоящему Порядку;</text:span></text:p>
      <text:p text:style-name="P9"><text:span text:style-name="T1">б) акт классификации информационной (автоматизированной) системы по форме согласно </text:span><text:span text:style-name="Основной_20_шрифт_20_абзаца"><text:span text:style-name="T1">приложению N 3</text:span></text:span><text:span text:style-name="T1"> к настоящему Порядку, акт категорирования значимого объекта критической информационной инфраструктуры Российской Федерации (далее - акт категорирования значимого объекта);</text:span></text:p>
      <text:p text:style-name="P10">в) модель угроз безопасности информации (в случае ее разработки в соответствии с требованиями по защите информации);</text:p>
      <text:p text:style-name="P10">г) техническое задание на создание (развитие, модернизацию) объекта информатизации и (или) частное техническое задание на создание (развитие, модернизацию) системы защиты информации объекта информатизации (для объекта информатизации, входящего в состав объекта капитального строительства, задание на проектирование (реконструкцию) объекта капитального строительства) (в случае их разработки в ходе создания объекта информатизации);</text:p>
      <text:p text:style-name="P10">д) проектную документацию на систему защиты информации объекта информатизации (в случае ее разработки в ходе создания объекта информатизации);</text:p>
      <text:p text:style-name="P10">е) эксплуатационную документацию на систему защиты информации объекта информатизации и применяемые средства защиты информации;</text:p>
      <text:p text:style-name="P10">ж) организационно-распорядительные документы по защите информации владельца объекта информатизации, регламентирующие защиту информации в ходе эксплуатации объекта информатизации, в том числе план мероприятий по защите информации на объекте информатизации, документы по порядку оценки угроз безопасности информации, управлению (администрированию) системой защиты информации, управлению конфигурацией объекта информатизации, реагированию на инциденты безопасности, информированию и обучению персонала, контролю за обеспечением уровня защищенности информации (далее - документы по защите информации владельца объекта информатизации);</text:p>
      <text:p text:style-name="P10">з) документы, содержащие результаты анализа уязвимостей объекта информатизации и приемочных испытаний системы защиты информации объекта информатизации (в случае проведения анализа и испытаний в ходе создания объекта информатизации).</text:p>
      <text:p text:style-name="P10">По решению владельца объекта информатизации указанные в настоящем пункте документы (их копии) представляются в орган по аттестации в виде электронных документов.</text:p>
      <text:p text:style-name="P9"><text:span text:style-name="T1">12. На основе анализа документов, предусмотренных </text:span><text:span text:style-name="Основной_20_шрифт_20_абзаца"><text:span text:style-name="T1">пунктом 11</text:span></text:span><text:span text:style-name="T1"> настоящего Порядка, и предварительного ознакомления с объектом информатизации в условиях его эксплуатации орган по аттестации разрабатывает </text:span><text:soft-page-break/><text:span text:style-name="T1">программу и методики аттестационных испытаний.</text:span></text:p>
      <text:p text:style-name="P10">13. Программа и методики аттестационных испытаний объекта информатизации состоят из следующих разделов:</text:p>
      <text:p text:style-name="P10">а) общие положения;</text:p>
      <text:p text:style-name="P10">б) программа аттестационных испытаний объекта информатизации;</text:p>
      <text:p text:style-name="P10">в) методики аттестационных испытаний объекта информатизации.</text:p>
      <text:p text:style-name="P10">13.1. Раздел, касающийся общих положений, должен включать следующие сведения:</text:p>
      <text:p text:style-name="P10">а) наименование и краткое описание архитектуры объекта информатизации, класс защищенности информационной (автоматизированной) системы, категорию значимого объекта;</text:p>
      <text:p text:style-name="P10">б) фамилии, имена, отчества (при наличии), должности экспертов органа по аттестации, назначенных для проведения аттестации объекта информатизации;</text:p>
      <text:p text:style-name="P10">в) наименование и реквизиты документов ФСТЭК России, устанавливающих требования по защите информации, на соответствие которым проводится аттестация объекта информатизации;</text:p>
      <text:p text:style-name="P10">г) угрозы безопасности информации, актуальные для объекта информатизации, или сведения о модели угроз безопасности информации в случае ее разработки в соответствии с требованиями по защите информации.</text:p>
      <text:p text:style-name="P10">13.2. Раздел, касающийся программы аттестационных испытаний объекта информатизации, должен включать перечень работ по аттестации объекта информатизации, в том числе работы по обследованию объекта информатизации в условиях его эксплуатации, проведению аттестационных испытаний в соответствии с разрабатываемыми методиками испытаний, оформлению результатов аттестационных испытаний, а также общий срок проведения аттестации объекта информатизации и сроки выполнения каждой работы по аттестации объекта информатизации, фамилию и инициалы эксперта органа по аттестации, ответственного за проведение каждой работы.</text:p>
      <text:p text:style-name="P10">13.3. Раздел, касающийся методик аттестационных испытаний объекта информатизации, должен включать для каждого аттестационного испытания порядок, условия, исходные данные и методы испытаний, применяемые при проведении испытаний средства контроля эффективности защиты информации от несанкционированного доступа, а также контрольно-измерительное и испытательное оборудование.</text:p>
      <text:p text:style-name="P10">14. Программа и методики аттестационных испытаний объекта информатизации согласовываются органом по аттестации с владельцем объекта информатизации и утверждаются руководителем органа по аттестации до начала аттестационных испытаний.</text:p>
      <text:p text:style-name="P10">В ходе аттестационных испытаний объекта информатизации орган по аттестации может вносить изменения в программу и методики аттестационных испытаний объекта информатизации по согласованию с владельцем объекта информатизации.</text:p>
      <text:p text:style-name="P10"><text:bookmark text:name="P109"/>15. Аттестационные испытания включают следующие мероприятия и работы:</text:p>
      <text:p text:style-name="P10"><text:bookmark text:name="P110"/>а) оценку соответствия технического паспорта объекта информатизации, акта классификации информационной (автоматизированной) системы, акта категорирования значимого объекта, состава и содержания эксплуатационной документации на систему защиты информации объекта информатизации и документов по защите информации владельца объекта информатизации требованиям по защите информации и настоящему Порядку;</text:p>
      <text:p text:style-name="P9"><text:span text:style-name="T1">б) проверку наличия и согласования с ФСТЭК России в соответствии с </text:span><text:span text:style-name="Основной_20_шрифт_20_абзаца"><text:span text:style-name="T1">пунктом 3</text:span></text:span><text:span text:style-name="T1"> Требований к порядку создания, развития, ввода в эксплуатацию, эксплуатации и вывода из эксплуатации государственных информационных систем и дальнейшего хранения содержащейся в их базах данных информации, утвержденных постановлением Правительства Российской Федерации от 6 июля 2015 г. N 676 (Собрание законодательства Российской Федерации, 2015, N 28, ст. 4241; 2020, N 42, ст. 6615; 2021, N 23, ст. 4079), модели угроз безопасности информации, технического задания на создание (развитие, модернизацию) объекта информатизации (только для государственных информационных систем);</text:span></text:p>
      <text:p text:style-name="P9"><text:span text:style-name="T1">в) обследование объекта информатизации на предмет оценки соответствия объекта информатизации и условий его эксплуатации требованиям по защите информации, а также документам, предусмотренным </text:span><text:span text:style-name="Основной_20_шрифт_20_абзаца"><text:span text:style-name="T1">пунктом 11</text:span></text:span><text:span text:style-name="T1"> </text:span><text:soft-page-break/><text:span text:style-name="T1">настоящего Порядка;</text:span></text:p>
      <text:p text:style-name="P10">г) проверку наличия документов, содержащих результаты анализа уязвимостей, проведенного на этапах предварительных или приемочных испытаний системы защиты информации объекта информатизации;</text:p>
      <text:p text:style-name="P9"><text:span text:style-name="T1">д) проверку наличия сведений о средствах защиты информации, установленных на объекте информатизации, в реестре сертифицированных средств защиты информации, ведение которого осуществляет ФСТЭК России в соответствии с </text:span><text:span text:style-name="Основной_20_шрифт_20_абзаца"><text:span text:style-name="T1">Положением</text:span></text:span><text:span text:style-name="T1"> о системе сертификации средств защиты информации, утвержденным приказом ФСТЭК России от 3 апреля 2018 г. N 55 (зарегистрирован Минюстом России 11 мая 2018 г., регистрационный N 51063) (в случае наличия требования об обязательном применении сертифицированных средств защиты информации), или документов, подтверждающих проведение оценки соответствия средств защиты информации требованиям по безопасности информации в формах, отличных от сертификации;</text:span></text:p>
      <text:p text:style-name="P10">е) проверку наличия у владельца объекта информатизации работников, ответственных за обеспечение защиты информации в ходе эксплуатации объекта информатизации, в том числе за проведение оценки угроз безопасности информации, управление (администрирование) системой защиты информации (администраторов безопасности), управление конфигурацией объекта информатизации, реагирование на инциденты, информирование и обучение персонала, контроль за обеспечением уровня защиты информации, а также проверку достаточности установленных для них обязанностей в соответствии с требованиями по защите информации;</text:p>
      <text:p text:style-name="P10">ж) оценку уровня знаний и умений работников владельца объекта информатизации, ответственных за обеспечение защиты информации, в соответствии с установленными для них обязанностями в эксплуатационной документации и документах по защите информации владельца объекта информатизации;</text:p>
      <text:p text:style-name="P10"><text:bookmark text:name="P117"/>з) оценку соответствия принятых на объекте информатизации организационных мер требованиям по защите информации и их достаточности для защиты от актуальных для объекта информатизации угроз безопасности информации;</text:p>
      <text:p text:style-name="P10"><text:bookmark text:name="P118"/>и) оценку соответствия принятых на объекте информатизации технических мер по защите информации от несанкционированного доступа (воздействия на информацию) требованиям по защите информации и их достаточности для защиты от актуальных для объекта информатизации угроз безопасности информации;</text:p>
      <text:p text:style-name="P10"><text:bookmark text:name="P119"/>к) оценку эффективности защиты (защищенности) информации от утечки по техническим каналам (только для защищаемых помещений).</text:p>
      <text:p text:style-name="P10"><text:bookmark text:name="P120"/>16. При проведении аттестационных испытаний органом по аттестации проводятся:</text:p>
      <text:p text:style-name="P9"><text:span text:style-name="T1">а) при проведении мероприятий и работ, предусмотренных </text:span><text:span text:style-name="Основной_20_шрифт_20_абзаца"><text:span text:style-name="T1">подпунктами "а"</text:span></text:span><text:span text:style-name="T1"> - </text:span><text:span text:style-name="Основной_20_шрифт_20_абзаца"><text:span text:style-name="T1">"з" пункта 15</text:span></text:span><text:span text:style-name="T1"> настоящего Порядка, - оценка соответствия системы защиты информации объекта информатизации требованиям по защите информации на основе анализа экспертами органа по аттестации документов, предусмотренных </text:span><text:span text:style-name="Основной_20_шрифт_20_абзаца"><text:span text:style-name="T1">пунктом 15</text:span></text:span><text:span text:style-name="T1"> настоящего Порядка;</text:span></text:p>
      <text:p text:style-name="P9"><text:span text:style-name="T1">б) при проведении работ, предусмотренных </text:span><text:span text:style-name="Основной_20_шрифт_20_абзаца"><text:span text:style-name="T1">подпунктом "и" пункта 15</text:span></text:span><text:span text:style-name="T1"> настоящего Порядка, - испытания системы защиты информации путем осуществления тестирования ее функций безопасности (функциональное тестирование), анализ уязвимостей с использованием средств контроля эффективности защиты информации от несанкционированного доступа, а также испытания системы защиты информации путем осуществления попыток несанкционированного доступа (воздействия) в обход системы защиты информации с использованием средств тестирования;</text:span></text:p>
      <text:p text:style-name="P9"><text:span text:style-name="T1">в) при проведении работ, предусмотренных </text:span><text:span text:style-name="Основной_20_шрифт_20_абзаца"><text:span text:style-name="T1">подпунктом "к" пункта 15</text:span></text:span><text:span text:style-name="T1"> настоящего Порядка, - оценка показателей эффективности защиты информации с применением контрольно-измерительного и испытательного оборудования.</text:span></text:p>
      <text:p text:style-name="P10">17. В ходе аттестационных испытаний объекта информатизации владельцем объекта информатизации могут вноситься изменения в объект информатизации, в том числе в архитектуру его системы защиты информации, в целях приведения объекта информатизации в соответствие с требованиями по защите информации.</text:p>
      <text:p text:style-name="P10"><text:bookmark text:name="P125"/>18. По результатам аттестационных испытаний орган по аттестации оформляет заключение по результатам аттестационных испытаний объекта информатизации (далее - заключение), включающее следующие сведения:</text:p>
      <text:p text:style-name="P10">а) наименование объекта информатизации и его назначение, состав программно-технических, программных средств и средств защиты информации;</text:p>
      <text:p text:style-name="P10"><text:soft-page-break/>б) класс защищенности информационной (автоматизированной) системы, категория значимости значимого объекта;</text:p>
      <text:p text:style-name="P10">в) фамилии, имена, отчества (при наличии), должности экспертов органа по аттестации, проводивших аттестацию объекта информатизации;</text:p>
      <text:p text:style-name="P10">г) дату утверждения программы и методик аттестационных испытаний объекта информатизации;</text:p>
      <text:p text:style-name="P10">д) срок проведения аттестационных испытаний;</text:p>
      <text:p text:style-name="P12"><text:span text:style-name="T5">е</text:span>) наименования и реквизиты документов ФСТЭК России, устанавливающих требования по защите информации, на соответствие которым проводилась аттестация объекта информатизации;</text:p>
      <text:p text:style-name="P9"><text:span text:style-name="T3">ж</text:span><text:span text:style-name="T1">) результаты испытаний, предусмотренных </text:span><text:span text:style-name="Основной_20_шрифт_20_абзаца"><text:span text:style-name="T1">пунктом 15</text:span></text:span><text:span text:style-name="T1"> настоящего Порядка, с описанием состава проведенных работ и испытаний в соответствии с программой и методикой испытаний, указанием сроков выполнения каждого испытания и экспертов органа по аттестации, ответственных за проведение каждого испытания, используемых экспертами при испытаниях средств, а также заключение о соответствии (несоответствии) требованиям по защите информации по каждой проведенной работе и испытанию;</text:span></text:p>
      <text:p text:style-name="P10"><text:span text:style-name="T5">з</text:span>) рекомендации по устранению несоответствий системы защиты информации объекта информатизации требованиям по защите информации (далее - недостатки) в случае их выявления при проведении аттестационных испытаний;</text:p>
      <text:p text:style-name="P10"><text:span text:style-name="T5">и</text:span>) вывод о возможности или невозможности выдачи аттестата соответствия или о необходимости доработки системы защиты информации объекта информатизации.</text:p>
      <text:p text:style-name="P10">Заключение подписывается экспертами органа по аттестации, проводившими аттестацию объекта информатизации, и утверждается руководителем органа по аттестации.</text:p>
      <text:p text:style-name="P9"><text:span text:style-name="T1">19. По результатам испытаний, предусмотренных </text:span><text:span text:style-name="Основной_20_шрифт_20_абзаца"><text:span text:style-name="T1">подпунктами "и"</text:span></text:span><text:span text:style-name="T1"> и </text:span><text:span text:style-name="Основной_20_шрифт_20_абзаца"><text:span text:style-name="T1">"к" пункта 15</text:span></text:span><text:span text:style-name="T1"> настоящего Порядка, органом по аттестации наряду с заключением по результатам аттестационных испытаний оформляются протоколы аттестационных испытаний объекта информатизации (далее - протоколы), содержащие:</text:span></text:p>
      <text:p text:style-name="P10">а) наименование испытания в соответствии с программой и методикой испытаний;</text:p>
      <text:p text:style-name="P10">б) дату утверждения программы и методик аттестационных испытаний объекта информатизации;</text:p>
      <text:p text:style-name="P10">в) дату и место проведения аттестационных испытаний;</text:p>
      <text:p text:style-name="P10">г) критерии выполнения требований по защите информации, в отношении которых проводились испытания;</text:p>
      <text:p text:style-name="P10">д) условия и исходные данные для проведения испытаний;</text:p>
      <text:p text:style-name="P10">е) применяемые при проведении испытаний средства контроля эффективности защиты информации от несанкционированного доступа, а также контрольно-измерительное и испытательное оборудование;</text:p>
      <text:p text:style-name="P10">ж) описание порядка испытаний по оценке критериев выполнения требований по защите информации;</text:p>
      <text:p text:style-name="P10">з) результаты испытаний по каждому оцениваемому критерию выполнения требований по защите информации.</text:p>
      <text:p text:style-name="P10">Протоколы подписываются экспертами органа по аттестации, проводившими аттестационные испытания объекта информатизации.</text:p>
      <text:p text:style-name="P10">20. Заключение и протоколы в течение 5 рабочих дней после утверждения органом по аттестации направляются владельцу объекта информатизации.</text:p>
      <text:p text:style-name="P10">21. В случае выявления в ходе аттестационных испытаний недостатков, которые можно устранить в процессе аттестации объекта информатизации, владелец объекта информатизации обеспечивает их устранение, а орган по аттестации оценивает качество такого устранения.</text:p>
      <text:p text:style-name="P9"><text:span text:style-name="T1">По результатам устранения недостатков орган по аттестации повторно оформляет заключение, в которое наряду со сведениями, указанными в </text:span><text:span text:style-name="Основной_20_шрифт_20_абзаца"><text:span text:style-name="T1">пункте 18</text:span></text:span><text:span text:style-name="T1"> настоящего Порядка, включаются сведения об устранении владельцем </text:span><text:soft-page-break/><text:span text:style-name="T1">объекта информатизации всех выявленных недостатков, а также делается вывод о возможности выдачи аттестата соответствия требованиям по защите информации (далее - аттестат соответствия) на объект информатизации.</text:span></text:p>
      <text:p text:style-name="P9"><text:span text:style-name="T1">22. Аттестат соответствия оформляется органом по аттестации по форме согласно </text:span><text:span text:style-name="Основной_20_шрифт_20_абзаца"><text:span text:style-name="T1">приложению N 4</text:span></text:span><text:span text:style-name="T1"> к настоящему Порядку.</text:span></text:p>
      <text:p text:style-name="P10">Аттестат соответствия подписывается руководителем органа по аттестации и заверяется печатью органа по аттестации (при наличии).</text:p>
      <text:p text:style-name="P10">Аттестат соответствия вручается органом по аттестации владельцу объекта информатизации или направляется ему заказным почтовым отправлением с уведомлением о вручении.</text:p>
      <text:p text:style-name="P10">23. В случае выявления при проведении аттестационных испытаний недостатков, которые невозможно устранить в процессе аттестации объекта информатизации, работы по аттестации объекта информатизации завершаются, аттестат соответствия не оформляется.</text:p>
      <text:p text:style-name="P10"><text:bookmark text:name="P155"/>24. Владелец объекта информатизации в случае несогласия с выявленными органом по аттестации недостатками и выводами, содержащимися в заключении и протоколах, направляет в течение 5 рабочих дней с момента получения заключения и протоколов письменное обращение с обоснованием такого несогласия (далее - обращение) в ФСТЭК России. Обращения федеральных органов государственной власти или государственных корпораций направляются в центральный аппарат ФСТЭК России, обращения иных владельцев объектов информатизации направляются в управление ФСТЭК России по федеральному округу, на территории которого расположен объект информатизации (далее - территориальный орган ФСТЭК России).</text:p>
      <text:p text:style-name="P10">К обращению прилагаются в электронном виде копии следующих документов:</text:p>
      <text:p text:style-name="P10">а) технического паспорта на объект информатизации;</text:p>
      <text:p text:style-name="P10">б) акта классификации информационной (автоматизированной) системы (акта категорирования значимого объекта);</text:p>
      <text:p text:style-name="P10">в) программы и методик аттестационных испытаний объекта информатизации;</text:p>
      <text:p text:style-name="P10">г) заключения и протоколов.</text:p>
      <text:p text:style-name="P9"><text:bookmark text:name="P161"/><text:span text:style-name="T1">25. ФСТЭК России (территориальный орган ФСТЭК России) в течение 10 календарных дней с даты получения обращения проводит оценку документов, указанных в </text:span><text:span text:style-name="Основной_20_шрифт_20_абзаца"><text:span text:style-name="T1">пункте 24</text:span></text:span><text:span text:style-name="T1"> настоящего Порядка, на предмет соответствия проведенных органом по аттестации аттестационных испытаний и выводов, содержащихся в заключении, требованиям по защите информации и настоящему Порядку. По согласованию с владельцем объекта информатизации работники ФСТЭК России (территориального органа ФСТЭК России) проводят контрольные испытания на объекте информатизации в соответствии с </text:span><text:span text:style-name="Основной_20_шрифт_20_абзаца"><text:span text:style-name="T1">пунктами 15</text:span></text:span><text:span text:style-name="T1"> и </text:span><text:span text:style-name="Основной_20_шрифт_20_абзаца"><text:span text:style-name="T1">16</text:span></text:span><text:span text:style-name="T1"> настоящего Порядка.</text:span></text:p>
      <text:p text:style-name="P9"><text:span text:style-name="T1">26. Если по результатам оценки, проведенной в соответствии с </text:span><text:span text:style-name="Основной_20_шрифт_20_абзаца"><text:span text:style-name="T1">пунктом 25</text:span></text:span><text:span text:style-name="T1"> настоящего Порядка, установлено несоответствие аттестационных испытаний и (или) выводов, содержащихся в заключении или протоколах, требованиям по защите информации или настоящему Порядку, ФСТЭК России (территориальный орган ФСТЭК России) направляет в орган по аттестации уведомление о необходимости устранения выявленных недостатков в указанный в уведомлении срок. Копия уведомления направляется владельцу объекта информатизации. Орган по аттестации обязан устранить недостатки, выявленные ФСТЭК России по результатам оценки документов, в указанный в уведомлении срок и оформить аттестат соответствия.</text:span></text:p>
      <text:p text:style-name="P9"><text:span text:style-name="T1">Если по результатам оценки, проведенной в соответствии с </text:span><text:span text:style-name="Основной_20_шрифт_20_абзаца"><text:span text:style-name="T1">пунктом 25</text:span></text:span><text:span text:style-name="T1"> настоящего Порядка, ФСТЭК России (территориальным органом ФСТЭК России) подтвержден вывод органа по аттестации о невозможности выдачи аттестата соответствия, аттестат соответствия на объект информатизации органом по аттестации не оформляется. Результаты проведенной оценки направляются ФСТЭК России (территориальным органом ФСТЭК России) владельцу объекта информатизации для устранения недостатков, выявленных органом по аттестации.</text:span></text:p>
      <text:p text:style-name="P10"><text:bookmark text:name="P164"/>27. Орган по аттестации в течение 5 рабочих дней после подписания аттестата соответствия представляет в ФСТЭК России (территориальный орган ФСТЭК России) в электронном виде копии следующих документов:</text:p>
      <text:p text:style-name="P10">а) аттестата соответствия объекта информатизации;</text:p>
      <text:p text:style-name="P10">б) технического паспорта на объект информатизации;</text:p>
      <text:p text:style-name="P10"><text:soft-page-break/>в) акта классификации информационной (автоматизированной) системы, акта категорирования значимого объекта;</text:p>
      <text:p text:style-name="P10">г) программы и методик аттестационных испытаний объекта информатизации;</text:p>
      <text:p text:style-name="P10">д) заключения и протоколов.</text:p>
      <text:p text:style-name="P10">Копии технического паспорта на объект информатизации, акта классификации информационной (автоматизированной) системы, акта категорирования значимого объекта передаются в электронном виде владельцем объекта информатизации в орган по аттестации.</text:p>
      <text:p text:style-name="P9"><text:span text:style-name="T1">28. ФСТЭК России (территориальный орган ФСТЭК России) в течение 3 рабочих дней со дня получения от органа по аттестации документов, предусмотренных </text:span><text:span text:style-name="Основной_20_шрифт_20_абзаца"><text:span text:style-name="T1">пунктом 27</text:span></text:span><text:span text:style-name="T1"> настоящего Порядка, вносит сведения об аттестованном объекте информатизации в реестр аттестованных объектов информатизации, ведение которого осуществляется ФСТЭК России в соответствии с </text:span><text:span text:style-name="Основной_20_шрифт_20_абзаца"><text:span text:style-name="T1">подпунктом 20 пункта 9</text:span></text:span><text:span text:style-name="T1"> Положения о Федеральной службе по техническому и экспортному контролю, утвержденного Указом Президента Российской Федерации от 16 августа 2004 г. N 1085.</text:span></text:p>
      <text:p text:style-name="P9"><text:span text:style-name="T1">29. ФСТЭК России (территориальный орган ФСТЭК России) после внесения сведений об аттестованном объекте информатизации в реестр аттестованных объектов информатизации проводит экспертно-документальную оценку документов, представленных органом по аттестации в соответствии с </text:span><text:span text:style-name="Основной_20_шрифт_20_абзаца"><text:span text:style-name="T1">пунктом 27</text:span></text:span><text:span text:style-name="T1"> настоящего Порядка.</text:span></text:p>
      <text:p text:style-name="P10"><text:bookmark text:name="P173"/>30. В случае выявления по результатам экспертно-документальной оценки представленных материалов недостатков, которые свидетельствуют о несоответствии принятых на объекте информатизации мер требованиям по защите информации и (или) их недостаточности для защиты от актуальных для объекта информатизации угроз безопасности информации, ФСТЭК России (территориальный орган ФСТЭК России) оформляет заключение, содержащее описание выявленных недостатков, а также рекомендации по их устранению, и направляет его владельцу объекта информатизации и органу по аттестации. Владелец объекта информатизации в соответствии с выданными рекомендациями обеспечивает устранение выявленных недостатков в указанный в заключении срок.</text:p>
      <text:p text:style-name="P9"><text:span text:style-name="T1">Об устранении недостатков владелец объекта информатизации информирует ФСТЭК России (территориальный орган ФСТЭК России). Неустранение недостатков, выявленных ФСТЭК России (территориальным органом ФСТЭК России), в указанный в заключении срок является основанием для приостановления действия аттестата соответствия в соответствии с </text:span><text:span text:style-name="Основной_20_шрифт_20_абзаца"><text:span text:style-name="T1">пунктами 34</text:span></text:span><text:span text:style-name="T1"> - </text:span><text:span text:style-name="Основной_20_шрифт_20_абзаца"><text:span text:style-name="T1">37</text:span></text:span><text:span text:style-name="T1"> настоящего Порядка.</text:span></text:p>
      <text:p text:style-name="P10">В случае выявления по результатам проведенной оценки недостатков, не приводящих к возникновению угроз безопасности информации, ФСТЭК России (территориальный орган ФСТЭК России) направляет письмо в орган по аттестации с целью учета при проведении работ по аттестации объектов информатизации.</text:p>
      <text:p text:style-name="P10">31. Аттестат соответствия выдается на весь срок эксплуатации объекта информатизации.</text:p>
      <text:p text:style-name="P10">Владелец аттестованного объекта информатизации обеспечивает поддержку его безопасности в соответствии с аттестатом соответствия путем реализации требований по защите информации в ходе эксплуатации аттестованного объекта информатизации и проведения периодического контроля уровня защиты информации на аттестованном объекте информатизации, результаты которого оформляются протоколами и отражаются в техническом паспорте на объект информатизации.</text:p>
      <text:p text:style-name="P10"><text:bookmark text:name="P178"/>32. Протоколы контроля защиты информации на аттестованном объекте информатизации не реже одного раза в два года представляются владельцем объекта информатизации в ФСТЭК России (территориальный орган ФСТЭК России).</text:p>
      <text:p text:style-name="P9"><text:span text:style-name="T1">Непредставление протоколов контроля защиты информации в ФСТЭК России (территориальный орган ФСТЭК России) является основанием для приостановления действия аттестата соответствия в соответствии с </text:span><text:span text:style-name="Основной_20_шрифт_20_абзаца"><text:span text:style-name="T1">пунктами 34</text:span></text:span><text:span text:style-name="T1"> - </text:span><text:span text:style-name="Основной_20_шрифт_20_абзаца"><text:span text:style-name="T1">37</text:span></text:span><text:span text:style-name="T1"> настоящего Порядка.</text:span></text:p>
      <text:p text:style-name="P10">33. В случае развития (модернизации) объекта информатизации, в ходе которого изменена конфигурация (параметры настройки) программных, программно-технических средств и средств защиты информации, исключены программные, программно-технические средства и средства защиты информации, дополнительно включены аналогичных средств или заменены на аналогичные средства проводятся дополнительные аттестационные испытания в соответствии с настоящим Порядком. Сведения об изменениях аттестованного объекта информатизации и проведенных при этом аттестационных испытаниях включаются владельцем объекта информатизации в технический паспорт. Действие аттестата соответствия не прекращается.</text:p>
      <text:p text:style-name="P10"><text:soft-page-break/>В случае развития (модернизации) объекта информатизации, приводящего к повышению класса защищенности (уровня защищенности, категории значимости) объекта информатизации и (или) к изменению архитектуры системы защиты информации объекта информатизации в части изменения видов и типов программных, программно-технических средств и средств защиты информации, изменения структуры системы защиты информации, состава и мест расположения объекта <text:span text:style-name="T4">информатизации</text:span> и его компонентов, проводится повторная аттестация в соответствии с настоящим Порядком.</text:p>
      <text:p text:style-name="P10"><text:bookmark text:name="P182"/>34. Действие аттестата соответствия приостанавливается ФСТЭК России (территориальным органом ФСТЭК России) в случае:</text:p>
      <text:p text:style-name="P10">а) установления факта несоответствия аттестованного объекта информатизации требованиям по защите информации, в результате чего имеется или имелась возможность возникновения угроз безопасности информации;</text:p>
      <text:p text:style-name="P9"><text:span text:style-name="T1">б) неустранения недостатков, выявленных ФСТЭК России (территориальным органом ФСТЭК России) в соответствии с </text:span><text:span text:style-name="Основной_20_шрифт_20_абзаца"><text:span text:style-name="T1">пунктом 30</text:span></text:span><text:span text:style-name="T1"> настоящего Порядка;</text:span></text:p>
      <text:p text:style-name="P9"><text:span text:style-name="T1">в) непредставления протоколов контроля уровня защиты информации на аттестованном объекте информатизации в соответствии с </text:span><text:span text:style-name="Основной_20_шрифт_20_абзаца"><text:span text:style-name="T1">пунктом 32</text:span></text:span><text:span text:style-name="T1"> настоящего Порядка;</text:span></text:p>
      <text:p text:style-name="P10">г) изменений архитектуры системы защиты информации аттестованного объекта информатизации, которые приводят к несоответствию этого объекта аттестату соответствия;</text:p>
      <text:p text:style-name="P10">д) обращения владельца объекта информатизации о приостановлении действия аттестата соответствия.</text:p>
      <text:p text:style-name="P10">Установление фактов несоответствия аттестованного объекта информатизации требованиям по защите информации, неустранения недостатков и изменений архитектуры осуществляется на основании:</text:p>
      <text:p text:style-name="P9"><text:span text:style-name="T1">результатов контроля за состоянием работ по технической защите информации, осуществляемого ФСТЭК России в соответствии с </text:span><text:span text:style-name="Основной_20_шрифт_20_абзаца"><text:span text:style-name="T1">подпунктом 7 пункта 8</text:span></text:span><text:span text:style-name="T1"> Положения о Федеральной службе по техническому и экспортному контролю, утвержденного Указом Президента Российской Федерации от 16 августа 2004 г. N 1085;</text:span></text:p>
      <text:p text:style-name="P10">результатов контроля за реализацией настоящего Порядка.</text:p>
      <text:p text:style-name="P10">35. Решение о приостановлении действия аттестата соответствия оформляется приказом ФСТЭК России (территориального органа ФСТЭК России).</text:p>
      <text:p text:style-name="P10">Действие аттестата соответствия может быть приостановлено на срок не более 90 календарных дней.</text:p>
      <text:p text:style-name="P10">ФСТЭК России (территориальный орган ФСТЭК России) в течение 5 рабочих дней со дня принятия решения направляет заказным почтовым отправлением с уведомлением о вручении или вручает владельцу объекта информатизации уведомление о приостановлении действия аттестата соответствия.</text:p>
      <text:p text:style-name="P10">36. ФСТЭК России (территориальный орган ФСТЭК России) вносит сведения о приостановлении действия аттестата соответствия в реестр аттестованных объектов информатизации.</text:p>
      <text:p text:style-name="P10"><text:bookmark text:name="P195"/>37. В случае приостановления действия аттестата соответствия владелец объекта информатизации прекращает эксплуатацию объекта информатизации или по согласованию ФСТЭК России принимает меры, исключающие возможность возникновения угроз безопасности информации.</text:p>
      <text:p text:style-name="P10">38. Действие аттестата соответствия возобновляется ФСТЭК России (территориальным органом ФСТЭК России) в случае:</text:p>
      <text:p text:style-name="P10">а) устранения несоответствия объекта информатизации требованиям по защите информации и представления владельцем объекта информатизации в ФСТЭК России (территориальный орган ФСТЭК России) материалов, подтверждающих устранение недостатков;</text:p>
      <text:p text:style-name="P9"><text:span text:style-name="T1">б) представления в ФСТЭК России протоколов контроля уровня защиты информации на аттестованном объекте информатизации в соответствии с </text:span><text:span text:style-name="Основной_20_шрифт_20_абзаца"><text:span text:style-name="T1">пунктом 32</text:span></text:span><text:span text:style-name="T1"> настоящего Порядка;</text:span></text:p>
      <text:p text:style-name="P10">в) проведения аттестации объекта информатизации в соответствии с настоящим Порядком для измененной архитектуры системы защиты информации и представления владельцем объекта информатизации в ФСТЭК России (территориальный орган ФСТЭК России) материалов, подтверждающих проведение аттестации;</text:p>
      <text:p text:style-name="P10"><text:soft-page-break/>г) обращения владельца объекта информатизации о возобновлении действия аттестата соответствия на объект информатизации в случае, если решение о приостановлении его действия было принято по обращению владельца объекта информатизации.</text:p>
      <text:p text:style-name="P10">39. Решение о возобновлении действия аттестата соответствия на объект информатизации оформляется приказом ФСТЭК России (территориального органа ФСТЭК России).</text:p>
      <text:p text:style-name="P10">ФСТЭК России (территориальный орган ФСТЭК России) в течение 5 рабочих дней со дня принятия решения направляет заказным почтовым отправлением с уведомлением о вручении или вручает владельцу объекта информатизации уведомление о возобновлении действия аттестата соответствия.</text:p>
      <text:p text:style-name="P10">40. Действие аттестата соответствия прекращается ФСТЭК России (территориальным органом ФСТЭК России) в случае:</text:p>
      <text:p text:style-name="P10">а) непредставления владельцем объекта информатизации в установленный в уведомлении о приостановлении действия аттестата соответствия срок материалов, подтверждающих устранение недостатков;</text:p>
      <text:p text:style-name="P10">б) непредставления владельцем объекта информатизации в установленный в уведомлении о приостановлении действия аттестата соответствия срок протоколов контроля уровня защищенности информации на аттестованном объекте информатизации;</text:p>
      <text:p text:style-name="P10">в) непредставления владельцем объекта информатизации в установленный в уведомлении о приостановлении действия аттестата соответствия срок материалов, подтверждающих проведение аттестации объекта информатизации для измененной архитектуры системы защиты информации;</text:p>
      <text:p text:style-name="P10">г) обращения владельца объекта информатизации о прекращении действия аттестата соответствия.</text:p>
      <text:p text:style-name="P10">41. Решение о прекращении действия аттестата соответствия оформляется приказом ФСТЭК России (территориального органа ФСТЭК России).</text:p>
      <text:p text:style-name="P10">Приказ территориального органа ФСТЭК России о прекращении действия аттестата соответствия подлежит согласованию со структурным подразделением ФСТЭК России, на которое возложены вопросы организации аттестации объектов информатизации.</text:p>
      <text:p text:style-name="P10">ФСТЭК России (территориальный орган ФСТЭК России) в течение 5 рабочих дней со дня принятия решения направляет заказным почтовым отправлением с уведомлением о вручении или вручает владельцу объекта информатизации уведомление о прекращении действия аттестата соответствия.</text:p>
      <text:p text:style-name="P10">42. В случае прекращения действия аттестата соответствия владелец объекта информатизации прекращает эксплуатацию объекта информатизации, если действие аттестата соответствия ранее не было приостановлено.</text:p>
      <text:p text:style-name="P10">43. ФСТЭК России (территориальный орган ФСТЭК России) вносит сведения о прекращении действия аттестата соответствия в реестр аттестованных объектов информатизации.</text:p>
      <text:p text:style-name="P10">44. В случае утраты аттестата соответствия владелец объекта информатизации вправе обратиться в орган по аттестации с заявлением о выдаче дубликата аттестата соответствия.</text:p>
      <text:p text:style-name="P10">В течение 20 рабочих дней со дня получения заявления о выдаче дубликата аттестата соответствия орган по аттестации оформляет дубликат аттестата соответствия с пометкой "дубликат, оригинал аттестата соответствия признается недействующим" и вручает его владельцу объекта информатизации или направляет заказным почтовым отправлением с уведомлением о вручении. Сведения о выданном дубликате аттестата соответствия направляются органом по аттестации в ФСТЭК России (территориальный орган ФСТЭК России).</text:p>
      <text:p text:style-name="P10">45. Орган по аттестации ежегодно не позднее 1 февраля года, следующего за отчетным, представляет в управление ФСТЭК России по федеральному округу, на территории которого расположен орган по аттестации, сведения об аттестованных им объектах информатизации, содержащие наименование объекта информатизации, адрес места его размещения, наименование владельца объекта информатизации, реквизиты выданного аттестата соответствия.</text:p>
      <text:p text:style-name="P4"/>
      <text:p text:style-name="P4"/>
      <text:p text:style-name="P4"/>
      <text:p text:style-name="P4"/>
      <text:p text:style-name="P4"><text:soft-page-break/></text:p>
      <text:h text:style-name="P21" text:outline-level="2">Приложение N 1</text:h>
      <text:p text:style-name="P5">к Порядку организации</text:p>
      <text:p text:style-name="P5">и проведения работ по аттестации</text:p>
      <text:p text:style-name="P5">объектов информатизации на соответствие</text:p>
      <text:p text:style-name="P5">требованиям о защите информации,</text:p>
      <text:p text:style-name="P5">не составляющей государственную тайну,</text:p>
      <text:p text:style-name="P5">утвержденному приказом ФСТЭК России</text:p>
      <text:p text:style-name="P5">от "__" апреля 2021 г. N ___</text:p>
      <text:p text:style-name="P4"/>
      <text:p text:style-name="P14"><text:s text:c="70"/>Форма</text:p>
      <text:p text:style-name="P14"><text:s text:c="70"/>-----</text:p>
      <text:p text:style-name="P14"/>
      <text:p text:style-name="P14"><text:s text:c="53"/>УТВЕРЖДАЮ</text:p>
      <text:p text:style-name="P14"><text:s text:c="40"/>___________________________________</text:p>
      <text:p text:style-name="P14"><text:s text:c="40"/>(руководитель (уполномоченное лицо)</text:p>
      <text:p text:style-name="P14"><text:s text:c="41"/>владельца объекта информатизации)</text:p>
      <text:p text:style-name="P14"><text:s text:c="40"/>___________________________________</text:p>
      <text:p text:style-name="P14"><text:s text:c="43"/>(подпись, инициалы и фамилия)</text:p>
      <text:p text:style-name="P14"/>
      <text:p text:style-name="P14"><text:s text:c="40"/>"__" ______________________ 20__ г.</text:p>
      <text:p text:style-name="P14"/>
      <text:p text:style-name="P14"><text:bookmark text:name="P242"/><text:s text:c="28"/>ТЕХНИЧЕСКИЙ ПАСПОРТ</text:p>
      <text:p text:style-name="P14"><text:s text:c="16"/>информационной (автоматизированной) системы</text:p>
      <text:p text:style-name="P14"><text:s text:c="7"/>____________________________________________________________</text:p>
      <text:p text:style-name="P14"><text:s text:c="8"/>(наименование информационной (автоматизированной) системы)</text:p>
      <text:p text:style-name="P14"/>
      <text:p text:style-name="P14"><text:s text:c="4"/>1. Общие сведения об информационной (автоматизированной) системе.</text:p>
      <text:p text:style-name="P14"><text:s text:c="4"/>1.1. <text:s/>Наименование <text:s/>и <text:s/>назначение <text:s/>информационной <text:s/>(автоматизированной)</text:p>
      <text:p text:style-name="P14">системы: _________________________________________________________________.</text:p>
      <text:p text:style-name="P14"><text:s text:c="4"/>1.2. <text:s text:c="2"/>Расположение <text:s text:c="2"/>программно-технических <text:s text:c="2"/>средств <text:s text:c="2"/>информационной</text:p>
      <text:p text:style-name="P14">(автоматизированной) системы: ____________________________________________.</text:p>
      <text:p text:style-name="P14"><text:s text:c="32"/>(указываются адреса расположения средств)</text:p>
      <text:p text:style-name="P14"><text:s text:c="4"/>1.3. <text:s text:c="5"/>Установленный <text:s text:c="5"/>класс <text:s text:c="5"/>защищенности <text:s text:c="4"/>информационной</text:p>
      <text:p text:style-name="P14">(автоматизированной) <text:s text:c="2"/>системы <text:s text:c="2"/>(категория <text:s text:c="2"/>значимого <text:s text:c="2"/>объекта, <text:s/>уровень</text:p>
      <text:p text:style-name="P14">защищенности персональных данных): _______________________________________.</text:p>
      <text:p text:style-name="P14"><text:s text:c="39"/>(указываются реквизиты документа)</text:p>
      <text:p text:style-name="P14"><text:s text:c="4"/>1.4. <text:s/>Сведения <text:s/>о <text:s/>вводе <text:s/>информационной (автоматизированной) системы в</text:p>
      <text:p text:style-name="P14">эксплуатацию: ____________________________________________________________.</text:p>
      <text:p text:style-name="P14"><text:s text:c="16"/>(указываются номер и дата приказа о вводе в эксплуатацию)</text:p>
      <text:p text:style-name="P14"><text:s text:c="4"/>2. Условия эксплуатации информационной (автоматизированной) системы</text:p>
      <text:p text:style-name="P14"><text:s text:c="4"/>2.1. Сведения <text:s/>об <text:s text:c="2"/>архитектуре <text:s text:c="2"/>информационной <text:s text:c="2"/>(автоматизированной)</text:p>
      <text:p text:style-name="P14">системы, <text:s/>включающие <text:s/>описание <text:s/>структуры <text:s/>и состава (типовых компонентов),</text:p>
      <text:p text:style-name="P14">структурную <text:s/>(топологическую) схему с указанием информационных связей между</text:p>
      <text:p text:style-name="P14">компонентами <text:s text:c="3"/>информационной <text:s text:c="2"/>(автоматизированной) <text:s text:c="2"/>системы <text:s text:c="2"/>и <text:s text:c="2"/>иными</text:p>
      <text:p text:style-name="P14">информационными системами, в том числе с сетью Интернет __________________.</text:p>
      <text:p text:style-name="P14"><text:s text:c="4"/>2.2. <text:s/>Описание <text:s/>технологического процесса обработки информации и режимы</text:p>
      <text:p text:style-name="P14">доступа <text:s/>к информационным ресурсам, включающее описание всех типов внешних,</text:p>
      <text:p text:style-name="P14">внутренних <text:s text:c="3"/>пользователей <text:s text:c="3"/>(привилегированных, <text:s text:c="3"/>непривилегированных),</text:p>
      <text:p text:style-name="P14">полномочий пользователей и тип доступа к информационным ресурсам _________.</text:p>
      <text:p text:style-name="P14"><text:s text:c="4"/>2.3. <text:s text:c="8"/>Сведения <text:s text:c="8"/>об <text:s text:c="8"/>аттестате <text:s text:c="8"/>соответствия</text:p>
      <text:p text:style-name="P14">информационно-телекоммуникационной <text:s/>инфраструктуры центра обработки данных,</text:p>
      <text:p text:style-name="P14">на <text:s/>базе которой функционирует информационная (автоматизированная) система,</text:p>
      <text:p text:style-name="P14">а <text:s/>также <text:s/>о <text:s/>модели услуг, по которой предоставляются вычислительные услуги</text:p>
      <text:p text:style-name="P14">(заполняется <text:s/>при <text:s/>условии <text:s/>аттестации <text:s/>информационной (автоматизированной)</text:p>
      <text:p text:style-name="P14">системы <text:s/>на <text:s/>базе <text:s/>аттестованной <text:s/>на <text:s/>соответствие <text:s/>требованиям <text:s/>по <text:s/>защите</text:p>
      <text:p text:style-name="P14">информации <text:s text:c="3"/>информационно-телекоммуникационной <text:s text:c="3"/>инфраструктуры <text:s text:c="2"/>центра</text:p>
      <text:p text:style-name="P14">обработки данных): _______________________________________________________.</text:p>
      <text:p text:style-name="P14"><text:s text:c="31"/>(указываются реквизиты аттестата</text:p>
      <text:p text:style-name="P14"><text:s text:c="33"/>соответствия и модель услуг)</text:p>
      <text:p text:style-name="P14"><text:soft-page-break/><text:s text:c="4"/>3. Состав информационной (автоматизированной) системы.</text:p>
      <text:p text:style-name="P14"><text:s text:c="4"/>3.1. <text:s text:c="4"/>Состав <text:s text:c="4"/>программно-технических <text:s text:c="3"/>средств <text:s text:c="3"/>информационной</text:p>
      <text:p text:style-name="P14">(автоматизированной) системы: ____________________________________________.</text:p>
      <text:p text:style-name="P14"><text:s text:c="34"/>(указываются типы технических средств,</text:p>
      <text:p text:style-name="P14"><text:s text:c="40"/>их наименования и модели)</text:p>
      <text:p text:style-name="P14"><text:s text:c="4"/>3.2. <text:s/>Состав <text:s/>общесистемного <text:s/>и <text:s/>прикладного <text:s/>программного <text:s/>обеспечения</text:p>
      <text:p text:style-name="P14">информационной <text:s text:c="16"/>(автоматизированной) <text:s text:c="15"/>системы:</text:p>
      <text:p text:style-name="P14">__________________________________________________________________________.</text:p>
      <text:p text:style-name="P14"><text:s text:c="16"/>(указываются типы программного обеспечения,</text:p>
      <text:p text:style-name="P14"><text:s text:c="15"/>их наименования и основные (мажорные) версии)</text:p>
      <text:p text:style-name="P14"><text:s text:c="4"/>3.3. <text:s text:c="3"/>Состав <text:s text:c="3"/>телекоммуникационного <text:s text:c="2"/>оборудования <text:s text:c="2"/>информационной</text:p>
      <text:p text:style-name="P14">(автоматизированной) <text:s/>системы <text:s/>и используемые для передачи информации линии</text:p>
      <text:p text:style-name="P14">связи: ___________________________________________________________________.</text:p>
      <text:p text:style-name="P14"><text:s text:c="17"/>(указываются типы оборудования, их наименования</text:p>
      <text:p text:style-name="P14"><text:s text:c="27"/>и основные (мажорные) версии)</text:p>
      <text:p text:style-name="P14"><text:s text:c="4"/>3.4. <text:s/>Состав <text:s/>средств <text:s/>защиты информации, используемых в информационной</text:p>
      <text:p text:style-name="P14">(автоматизированной) системе: _____________________________________________</text:p>
      <text:p text:style-name="P14">__________________________________________________________________________.</text:p>
      <text:p text:style-name="P14"><text:s text:c="16"/>(указываются типы средств, их наименования</text:p>
      <text:p text:style-name="P14"><text:s text:c="4"/>и основные (мажорные) версии, сведения о сертификатах соответствия)</text:p>
      <text:p text:style-name="P14"><text:s text:c="4"/>4. <text:s/>Сведения о соответствии информационной (автоматизированной) системы</text:p>
      <text:p text:style-name="P14">требованиям по защите информации.</text:p>
      <text:p text:style-name="P14"><text:s text:c="4"/>4.1. <text:s/>Сведения <text:s/>о <text:s/>протоколах <text:s/>аттестационных <text:s/>испытаний информационной</text:p>
      <text:p text:style-name="P14">(автоматизированной) системы _____________________________________________.</text:p>
      <text:p text:style-name="P14"><text:s text:c="33"/>(реквизиты протоколов и дата их выдачи)</text:p>
      <text:p text:style-name="P14"><text:s text:c="4"/>4.2. <text:s/>Сведения <text:s/>о <text:s/>заключении <text:s/>по <text:s/>результатам аттестационных испытаний</text:p>
      <text:p text:style-name="P14">информационной (автоматизированной) системы ______________________________.</text:p>
      <text:p text:style-name="P14"><text:s text:c="49"/>(реквизиты заключения</text:p>
      <text:p text:style-name="P14"><text:s text:c="53"/>и дата выдачи)</text:p>
      <text:p text:style-name="P14"><text:s text:c="4"/>4.3. <text:s text:c="4"/>Сведения <text:s text:c="4"/>об <text:s text:c="3"/>аттестате <text:s text:c="3"/>соответствия <text:s text:c="3"/>информационной</text:p>
      <text:p text:style-name="P14">(автоматизированной) <text:s text:c="2"/>системы <text:s text:c="2"/>на <text:s text:c="2"/>соответствие <text:s text:c="2"/>требованиям <text:s/>о <text:s/>защите</text:p>
      <text:p text:style-name="P14">информации: ______________________________________________________________.</text:p>
      <text:p text:style-name="P14"><text:s text:c="20"/>(реквизиты аттестата соответствия, дата выдачи)</text:p>
      <text:p text:style-name="P14"><text:s text:c="4"/>5. <text:s/>Сведения <text:s/>о <text:s/>проведении <text:s/>контроля <text:s/>за <text:s/>обеспечением <text:s/>уровня <text:s/>защиты</text:p>
      <text:p text:style-name="P14">информации, <text:s/>содержащейся <text:s/>в <text:s/>информационной <text:s/>(автоматизированной) системе,</text:p>
      <text:p text:style-name="P14">приведены в таблице 1.</text:p>
      <text:p text:style-name="P14"/>
      <text:p text:style-name="P14"><text:s text:c="66"/>Таблица 1</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table-cell table:style-name="Таблица3.A1" office:value-type="string">
            <text:p text:style-name="P6">N п/п</text:p>
          </table:table-cell>
          <table:table-cell table:style-name="Таблица3.A1" office:value-type="string">
            <text:p text:style-name="P6">Наименование организации (подразделения), проводившей контроль</text:p>
          </table:table-cell>
          <table:table-cell table:style-name="Таблица3.A1" office:value-type="string">
            <text:p text:style-name="P6">Дата проведения контроля</text:p>
          </table:table-cell>
          <table:table-cell table:style-name="Таблица3.A1" office:value-type="string">
            <text:p text:style-name="P6">Реквизиты документа с выводами о результатах контроля</text:p>
          </table:table-cell>
          <table:table-cell table:style-name="Таблица3.A1" office:value-type="string">
            <text:p text:style-name="P6">Вывод по результатам контроля</text:p>
          </table:table-cell>
        </table:table-row>
        <table:table-row>
          <table:table-cell table:style-name="Таблица3.A1" office:value-type="string">
            <text:p text:style-name="P6">1.</text:p>
          </table:table-cell>
          <table:table-cell table:style-name="Таблица3.A1" office:value-type="string">
            <text:p text:style-name="P3"/>
          </table:table-cell>
          <table:table-cell table:style-name="Таблица3.A1" office:value-type="string">
            <text:p text:style-name="P3"/>
          </table:table-cell>
          <table:table-cell table:style-name="Таблица3.A1" office:value-type="string">
            <text:p text:style-name="P3"/>
          </table:table-cell>
          <table:table-cell table:style-name="Таблица3.A1" office:value-type="string">
            <text:p text:style-name="P3"/>
          </table:table-cell>
        </table:table-row>
        <table:table-row>
          <table:table-cell table:style-name="Таблица3.A1" office:value-type="string">
            <text:p text:style-name="P6">2.</text:p>
          </table:table-cell>
          <table:table-cell table:style-name="Таблица3.A1" office:value-type="string">
            <text:p text:style-name="P3"/>
          </table:table-cell>
          <table:table-cell table:style-name="Таблица3.A1" office:value-type="string">
            <text:p text:style-name="P3"/>
          </table:table-cell>
          <table:table-cell table:style-name="Таблица3.A1" office:value-type="string">
            <text:p text:style-name="P3"/>
          </table:table-cell>
          <table:table-cell table:style-name="Таблица3.A1" office:value-type="string">
            <text:p text:style-name="P3"/>
          </table:table-cell>
        </table:table-row>
      </table:table>
      <text:p text:style-name="P4"/>
      <text:p text:style-name="P14"><text:s text:c="4"/>6. Сведения об изменениях информационной (автоматизированной) системы и</text:p>
      <text:p text:style-name="P14">средств защиты информации приведены в таблице 2.</text:p>
      <text:p text:style-name="P14"/>
      <text:p text:style-name="P14"><text:s text:c="66"/>Таблица 2</text:p>
      <text:p text:style-name="P4"/>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6">N п/п</text:p>
          </table:table-cell>
          <table:table-cell table:style-name="Таблица4.A1" office:value-type="string">
            <text:p text:style-name="P6">Дата внесения изменения</text:p>
          </table:table-cell>
          <table:table-cell table:style-name="Таблица4.A1" office:value-type="string">
            <text:p text:style-name="P6">Документ, на основании которого внесены <text:soft-page-break/>изменения</text:p>
          </table:table-cell>
          <table:table-cell table:style-name="Таблица4.A1" office:value-type="string">
            <text:p text:style-name="P6">Пункт технического паспорта, в который внесены <text:soft-page-break/>изменения</text:p>
          </table:table-cell>
          <table:table-cell table:style-name="Таблица4.A1" office:value-type="string">
            <text:p text:style-name="P6">Краткая характеристика изменений</text:p>
          </table:table-cell>
          <table:table-cell table:style-name="Таблица4.A1" office:value-type="string">
            <text:p text:style-name="P6">Подпись лица, внесшего изменения</text:p>
          </table:table-cell>
        </table:table-row>
        <table:table-row>
          <table:table-cell table:style-name="Таблица4.A1" office:value-type="string">
            <text:p text:style-name="P6">1.</text:p>
          </table:table-cell>
          <table:table-cell table:style-name="Таблица4.A1" office:value-type="string">
            <text:p text:style-name="P3"/>
          </table:table-cell>
          <table:table-cell table:style-name="Таблица4.A1" office:value-type="string">
            <text:p text:style-name="P3"/>
          </table:table-cell>
          <table:table-cell table:style-name="Таблица4.A1" office:value-type="string">
            <text:p text:style-name="P3"/>
          </table:table-cell>
          <table:table-cell table:style-name="Таблица4.A1" office:value-type="string">
            <text:p text:style-name="P3"/>
          </table:table-cell>
          <table:table-cell table:style-name="Таблица4.A1" office:value-type="string">
            <text:p text:style-name="P3"/>
          </table:table-cell>
        </table:table-row>
        <table:table-row>
          <table:table-cell table:style-name="Таблица4.A1" office:value-type="string">
            <text:p text:style-name="P6">2.</text:p>
          </table:table-cell>
          <table:table-cell table:style-name="Таблица4.A1" office:value-type="string">
            <text:p text:style-name="P3"/>
          </table:table-cell>
          <table:table-cell table:style-name="Таблица4.A1" office:value-type="string">
            <text:p text:style-name="P3"/>
          </table:table-cell>
          <table:table-cell table:style-name="Таблица4.A1" office:value-type="string">
            <text:p text:style-name="P3"/>
          </table:table-cell>
          <table:table-cell table:style-name="Таблица4.A1" office:value-type="string">
            <text:p text:style-name="P3"/>
          </table:table-cell>
          <table:table-cell table:style-name="Таблица4.A1" office:value-type="string">
            <text:p text:style-name="P3"/>
          </table:table-cell>
        </table:table-row>
      </table:table>
      <text:p text:style-name="P4"/>
      <text:p text:style-name="P14">Ответственный <text:s text:c="2"/>за <text:s/>обеспечение <text:s text:c="2"/>защиты <text:s/>информации <text:s/>в <text:s/>ходе <text:s/>эксплуатации</text:p>
      <text:p text:style-name="P14">информационной (автоматизированной) системы</text:p>
      <text:p text:style-name="P14"/>
      <text:p text:style-name="P14">_____________________ <text:s text:c="14"/>_______________________________________</text:p>
      <text:p text:style-name="P14"><text:s text:c="5"/>(должность) <text:s text:c="24"/>(подпись, фамилия и инициалы)</text:p>
      <text:p text:style-name="P14"/>
      <text:p text:style-name="P14">"__" ____________ 20__ г.</text:p>
      <text:p text:style-name="P4"/>
      <text:p text:style-name="P4"/>
      <text:p text:style-name="P4"/>
      <text:p text:style-name="P4"/>
      <text:p text:style-name="P4"/>
      <text:h text:style-name="P21" text:outline-level="2">Приложение N 2</text:h>
      <text:p text:style-name="P5">к Порядку организации</text:p>
      <text:p text:style-name="P5">и проведения работ по аттестации</text:p>
      <text:p text:style-name="P5">объектов информатизации на соответствие</text:p>
      <text:p text:style-name="P5">требованиям о защите информации,</text:p>
      <text:p text:style-name="P5">не составляющей государственную тайну,</text:p>
      <text:p text:style-name="P5">утвержденному приказом ФСТЭК России</text:p>
      <text:p text:style-name="P5">от "__" апреля 2021 г. N ___</text:p>
      <text:p text:style-name="P4"/>
      <text:p text:style-name="P14"><text:s text:c="70"/>Форма</text:p>
      <text:p text:style-name="P14"><text:s text:c="70"/>-----</text:p>
      <text:p text:style-name="P14"/>
      <text:p text:style-name="P14"><text:s text:c="53"/>УТВЕРЖДАЮ</text:p>
      <text:p text:style-name="P14"><text:s text:c="40"/>___________________________________</text:p>
      <text:p text:style-name="P14"><text:s text:c="40"/>(руководитель (уполномоченное лицо)</text:p>
      <text:p text:style-name="P14"><text:s text:c="41"/>владельца объекта информатизации)</text:p>
      <text:p text:style-name="P14"><text:s text:c="40"/>___________________________________</text:p>
      <text:p text:style-name="P14"><text:s text:c="43"/>(подпись, инициалы и фамилия)</text:p>
      <text:p text:style-name="P14"/>
      <text:p text:style-name="P14"><text:s text:c="40"/>"__" ______________________ 20__ г.</text:p>
      <text:p text:style-name="P14"/>
      <text:p text:style-name="P14"><text:bookmark text:name="P392"/><text:s text:c="28"/>ТЕХНИЧЕСКИЙ ПАСПОРТ</text:p>
      <text:p text:style-name="P14"><text:s text:c="27"/>защищаемого помещения</text:p>
      <text:p text:style-name="P14"><text:s text:c="7"/>____________________________________________________________</text:p>
      <text:p text:style-name="P14"><text:s text:c="19"/>(наименование защищаемого помещения)</text:p>
      <text:p text:style-name="P14"/>
      <text:p text:style-name="P14"><text:s text:c="4"/>1. Общие сведения о защищаемом помещении</text:p>
      <text:p text:style-name="P14"><text:s text:c="4"/>1.1. Наименование и назначение защищаемого помещения: ________________.</text:p>
      <text:p text:style-name="P14"><text:s text:c="4"/>1.2. Расположение защищаемого помещения: _____________________________.</text:p>
      <text:p text:style-name="P14"><text:s text:c="51"/>(указываются адрес,</text:p>
      <text:p text:style-name="P14"><text:s text:c="49"/>строение, этаж, номер)</text:p>
      <text:p text:style-name="P14"><text:s text:c="4"/>1.3. <text:s/>Сведения <text:s/>о <text:s/>проведении <text:s/>проверок <text:s/>защищаемого <text:s/>помещения с целью</text:p>
      <text:p text:style-name="P14">выявления возможно внедренных электронных устройств <text:s/>перехвата <text:s/>информации:</text:p>
      <text:p text:style-name="P14">__________________________________________________________________________.</text:p>
      <text:p text:style-name="P14"><text:s text:c="20"/>(указываются реквизиты заключения,</text:p>
      <text:p text:style-name="P14"><text:s text:c="14"/>наименование организации, проводившей проверки)</text:p>
      <text:p text:style-name="P14"><text:s text:c="4"/>1.4. Сведения <text:s text:c="5"/>об <text:s text:c="5"/>аттестации <text:s text:c="5"/>защищаемого <text:s text:c="6"/>помещения:</text:p>
      <text:p text:style-name="P14">__________________________________________________________________________.</text:p>
      <text:p text:style-name="P14"><text:s text:c="15"/>(указываются реквизиты аттестата соответствия</text:p>
      <text:p text:style-name="P14"><text:s text:c="18"/>требованиям по безопасности информации)</text:p>
      <text:p text:style-name="P14"><text:s text:c="4"/>1.5. <text:s text:c="2"/>Сведения <text:s text:c="2"/>о <text:s text:c="2"/>вводе <text:s text:c="2"/>защищаемого <text:s text:c="2"/>помещения <text:s/>в <text:s/>эксплуатацию:</text:p>
      <text:p text:style-name="P14"><text:soft-page-break/>__________________________________________________________________________.</text:p>
      <text:p text:style-name="P14"><text:s text:c="17"/>(указываются номер и дата приказа о вводе</text:p>
      <text:p text:style-name="P14"><text:s text:c="19"/>в эксплуатацию защищаемого помещения)</text:p>
      <text:p text:style-name="P14"><text:s text:c="4"/>2. Условия расположения и эксплуатации защищаемого помещения</text:p>
      <text:p text:style-name="P14"><text:s text:c="4"/>2.1. <text:s/>Сведения <text:s/>и схема расположения защищаемого помещения относительно</text:p>
      <text:p text:style-name="P14">границ <text:s/>контролируемой зоны с указанием расстояний до ее границ, сведения и</text:p>
      <text:p text:style-name="P14">схема <text:s/>основных <text:s/>технических <text:s/>средств <text:s/>и <text:s/>систем <text:s/>(в <text:s/>случае <text:s/>их <text:s/>наличия),</text:p>
      <text:p text:style-name="P14">вспомогательных <text:s/>технических средств и систем, средств защиты информации, а</text:p>
      <text:p text:style-name="P14">также <text:s/>линий, <text:s/>имеющих <text:s/>выход <text:s/>за пределы контролируемой зоны, относительно</text:p>
      <text:p text:style-name="P14">границ контролируемой зоны с указанием расстояний до ее границ.</text:p>
      <text:p text:style-name="P14"><text:s text:c="4"/>2.2. <text:s text:c="2"/>Сведения <text:s text:c="2"/>и <text:s text:c="2"/>схемы <text:s text:c="2"/>электроснабжения <text:s/>и <text:s/>заземления <text:s/>основных</text:p>
      <text:p text:style-name="P14">технических <text:s/>средств <text:s/>и <text:s/>систем <text:s/>(в <text:s/>случае <text:s/>их <text:s/>наличия) и вспомогательных</text:p>
      <text:p text:style-name="P14">технических средств и систем, установленных в защищаемом помещении, включая</text:p>
      <text:p text:style-name="P14">место расположения трансформаторной подстанции и заземляющего устройства, с</text:p>
      <text:p text:style-name="P14">указанием <text:s text:c="2"/>расстояний <text:s text:c="2"/>до <text:s text:c="2"/>границ <text:s text:c="2"/>контролируемой <text:s text:c="2"/>зоны, <text:s text:c="2"/>сведения <text:s/>о</text:p>
      <text:p text:style-name="P14">сопротивлении <text:s/>заземляющего <text:s/>устройства <text:s/>(при <text:s/>наличии основных технических</text:p>
      <text:p text:style-name="P14">средств и систем).</text:p>
      <text:p text:style-name="P14"><text:s text:c="4"/>3. Состав защищаемого помещения</text:p>
      <text:p text:style-name="P14"><text:s text:c="4"/>3.1. <text:s/>Состав <text:s/>основных <text:s/>технических <text:s/>средств <text:s/>и систем, установленных в</text:p>
      <text:p text:style-name="P14">защищаемом помещении, представлен в таблице 1.</text:p>
      <text:p text:style-name="P14"/>
      <text:p text:style-name="P14"><text:s text:c="66"/>Таблица 1</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B"/>
        <table:table-row>
          <table:table-cell table:style-name="Таблица5.A1" office:value-type="string">
            <text:p text:style-name="P6">N п/п</text:p>
          </table:table-cell>
          <table:table-cell table:style-name="Таблица5.A1" office:value-type="string">
            <text:p text:style-name="P6">Наименование основного технического средства и системы, заводской (инвентарный) номер</text:p>
          </table:table-cell>
          <table:table-cell table:style-name="Таблица5.A1" office:value-type="string">
            <text:p text:style-name="P6">Минимальное расстояние до границы контролируемой зоны, м</text:p>
          </table:table-cell>
          <table:table-cell table:style-name="Таблица5.A1" office:value-type="string">
            <text:p text:style-name="P2"><text:span text:style-name="T1">Сведения о специальных проверках </text:span><text:span text:style-name="Основной_20_шрифт_20_абзаца"><text:span text:style-name="T1">&lt;4&gt;</text:span></text:span></text:p>
          </table:table-cell>
          <table:table-cell table:style-name="Таблица5.A1" office:value-type="string">
            <text:p text:style-name="P2"><text:span text:style-name="T1">Сведения о специальных исследованиях или сертификатах соответствия </text:span><text:span text:style-name="Основной_20_шрифт_20_абзаца"><text:span text:style-name="T1">&lt;5&gt;</text:span></text:span></text:p>
          </table:table-cell>
        </table:table-row>
        <table:table-row>
          <table:table-cell table:style-name="Таблица5.A1" office:value-type="string">
            <text:p text:style-name="P6">1.</text:p>
          </table:table-cell>
          <table:table-cell table:style-name="Таблица5.A1" office:value-type="string">
            <text:p text:style-name="P3"/>
          </table:table-cell>
          <table:table-cell table:style-name="Таблица5.A1" office:value-type="string">
            <text:p text:style-name="P3"/>
          </table:table-cell>
          <table:table-cell table:style-name="Таблица5.A1" office:value-type="string">
            <text:p text:style-name="P3"/>
          </table:table-cell>
          <table:table-cell table:style-name="Таблица5.A1" office:value-type="string">
            <text:p text:style-name="P3"/>
          </table:table-cell>
        </table:table-row>
        <table:table-row>
          <table:table-cell table:style-name="Таблица5.A1" office:value-type="string">
            <text:p text:style-name="P6">2.</text:p>
          </table:table-cell>
          <table:table-cell table:style-name="Таблица5.A1" office:value-type="string">
            <text:p text:style-name="P3"/>
          </table:table-cell>
          <table:table-cell table:style-name="Таблица5.A1" office:value-type="string">
            <text:p text:style-name="P3"/>
          </table:table-cell>
          <table:table-cell table:style-name="Таблица5.A1" office:value-type="string">
            <text:p text:style-name="P3"/>
          </table:table-cell>
          <table:table-cell table:style-name="Таблица5.A1" office:value-type="string">
            <text:p text:style-name="P3"/>
          </table:table-cell>
        </table:table-row>
      </table:table>
      <text:p text:style-name="P4"/>
      <text:p text:style-name="P14"><text:s text:c="4"/>3.2. Состав вспомогательных технических средств и систем, установленных</text:p>
      <text:p text:style-name="P14">в защищаемом помещении, представлен в таблице 2.</text:p>
      <text:p text:style-name="P14"/>
      <text:p text:style-name="P14"><text:s text:c="66"/>Таблица 2</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P6">N п/п</text:p>
          </table:table-cell>
          <table:table-cell table:style-name="Таблица6.A1" office:value-type="string">
            <text:p text:style-name="P6">Наименование вспомогательного технического средства и системы, заводской (инвентарный) номер</text:p>
          </table:table-cell>
          <table:table-cell table:style-name="Таблица6.A1" office:value-type="string">
            <text:p text:style-name="P6">Минимальное расстояние до основных технических средств и систем, м</text:p>
          </table:table-cell>
          <table:table-cell table:style-name="Таблица6.A1" office:value-type="string">
            <text:p text:style-name="P6">Сведения о специальных проверках &lt;3&gt;</text:p>
          </table:table-cell>
          <table:table-cell table:style-name="Таблица6.A1" office:value-type="string">
            <text:p text:style-name="P2"><text:span text:style-name="T1">Сведения о специальных исследованиях или сертификатах соответствия </text:span><text:span text:style-name="Основной_20_шрифт_20_абзаца"><text:span text:style-name="T1">&lt;4&gt;</text:span></text:span></text:p>
          </table:table-cell>
        </table:table-row>
        <table:table-row>
          <table:table-cell table:style-name="Таблица6.A1" office:value-type="string">
            <text:p text:style-name="P6">1.</text:p>
          </table:table-cell>
          <table:table-cell table:style-name="Таблица6.A1" office:value-type="string">
            <text:p text:style-name="P3"/>
          </table:table-cell>
          <table:table-cell table:style-name="Таблица6.A1" office:value-type="string">
            <text:p text:style-name="P3"/>
          </table:table-cell>
          <table:table-cell table:style-name="Таблица6.A1" office:value-type="string">
            <text:p text:style-name="P3"/>
          </table:table-cell>
          <table:table-cell table:style-name="Таблица6.A1" office:value-type="string">
            <text:p text:style-name="P3"/>
          </table:table-cell>
        </table:table-row>
        <table:table-row>
          <table:table-cell table:style-name="Таблица6.A1" office:value-type="string">
            <text:p text:style-name="P6">2.</text:p>
          </table:table-cell>
          <table:table-cell table:style-name="Таблица6.A1" office:value-type="string">
            <text:p text:style-name="P3"/>
          </table:table-cell>
          <table:table-cell table:style-name="Таблица6.A1" office:value-type="string">
            <text:p text:style-name="P3"/>
          </table:table-cell>
          <table:table-cell table:style-name="Таблица6.A1" office:value-type="string">
            <text:p text:style-name="P3"/>
          </table:table-cell>
          <table:table-cell table:style-name="Таблица6.A1" office:value-type="string">
            <text:p text:style-name="P3"/>
          </table:table-cell>
        </table:table-row>
      </table:table>
      <text:p text:style-name="P4"/>
      <text:p text:style-name="P14"><text:s text:c="4"/>3.3. <text:s/>Состав <text:s/>средств <text:s/>защиты <text:s/>информации, <text:s/>используемых <text:s/>в <text:s/>защищаемом</text:p>
      <text:p text:style-name="P14">помещении, представлен в таблице 3.</text:p>
      <text:p text:style-name="P14"/>
      <text:p text:style-name="P14"><text:s text:c="66"/>Таблица 3</text:p>
      <text:p text:style-name="P4"/>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table-cell table:style-name="Таблица7.A1" office:value-type="string">
            <text:p text:style-name="P6">N п/п</text:p>
          </table:table-cell>
          <table:table-cell table:style-name="Таблица7.A1" office:value-type="string">
            <text:p text:style-name="P6">Наименование и тип средства защиты информации, заводской (инвентарный) номер</text:p>
          </table:table-cell>
          <table:table-cell table:style-name="Таблица7.A1" office:value-type="string">
            <text:p text:style-name="P2"><text:span text:style-name="T1">Сведения о сертификате соответствия </text:span><text:span text:style-name="Основной_20_шрифт_20_абзаца"><text:span text:style-name="T1">&lt;4&gt;</text:span></text:span></text:p>
          </table:table-cell>
          <table:table-cell table:style-name="Таблица7.A1" office:value-type="string">
            <text:p text:style-name="P6">Номер знака соответствия</text:p>
          </table:table-cell>
          <table:table-cell table:style-name="Таблица7.A1" office:value-type="string">
            <text:p text:style-name="P6">Место установки</text:p>
          </table:table-cell>
        </table:table-row>
        <text:soft-page-break/>
        <table:table-row>
          <table:table-cell table:style-name="Таблица7.A1" office:value-type="string">
            <text:p text:style-name="P6">1.</text:p>
          </table:table-cell>
          <table:table-cell table:style-name="Таблица7.A1" office:value-type="string">
            <text:p text:style-name="P3"/>
          </table:table-cell>
          <table:table-cell table:style-name="Таблица7.A1" office:value-type="string">
            <text:p text:style-name="P3"/>
          </table:table-cell>
          <table:table-cell table:style-name="Таблица7.A1" office:value-type="string">
            <text:p text:style-name="P3"/>
          </table:table-cell>
          <table:table-cell table:style-name="Таблица7.A1" office:value-type="string">
            <text:p text:style-name="P3"/>
          </table:table-cell>
        </table:table-row>
        <table:table-row>
          <table:table-cell table:style-name="Таблица7.A1" office:value-type="string">
            <text:p text:style-name="P6">2.</text:p>
          </table:table-cell>
          <table:table-cell table:style-name="Таблица7.A1" office:value-type="string">
            <text:p text:style-name="P3"/>
          </table:table-cell>
          <table:table-cell table:style-name="Таблица7.A1" office:value-type="string">
            <text:p text:style-name="P3"/>
          </table:table-cell>
          <table:table-cell table:style-name="Таблица7.A1" office:value-type="string">
            <text:p text:style-name="P3"/>
          </table:table-cell>
          <table:table-cell table:style-name="Таблица7.A1" office:value-type="string">
            <text:p text:style-name="P3"/>
          </table:table-cell>
        </table:table-row>
      </table:table>
      <text:p text:style-name="P4"/>
      <text:p text:style-name="P14"><text:s text:c="4"/>4. Сведения о периодическом контроле защищаемого помещения представлены</text:p>
      <text:p text:style-name="P14">в таблице 4.</text:p>
      <text:p text:style-name="P14"/>
      <text:p text:style-name="P14"><text:s text:c="66"/>Таблица 4</text:p>
      <text:p text:style-name="P4"/>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6">N п/п</text:p>
          </table:table-cell>
          <table:table-cell table:style-name="Таблица8.A1" office:value-type="string">
            <text:p text:style-name="P6">Дата проведения контроля</text:p>
          </table:table-cell>
          <table:table-cell table:style-name="Таблица8.A1" office:value-type="string">
            <text:p text:style-name="P6">Вывод по результатам контроля</text:p>
          </table:table-cell>
        </table:table-row>
        <table:table-row>
          <table:table-cell table:style-name="Таблица8.A1" office:value-type="string">
            <text:p text:style-name="P6">1</text:p>
          </table:table-cell>
          <table:table-cell table:style-name="Таблица8.A1" office:value-type="string">
            <text:p text:style-name="P3"/>
          </table:table-cell>
          <table:table-cell table:style-name="Таблица8.A1" office:value-type="string">
            <text:p text:style-name="P3"/>
          </table:table-cell>
        </table:table-row>
        <table:table-row>
          <table:table-cell table:style-name="Таблица8.A1" office:value-type="string">
            <text:p text:style-name="P6">2</text:p>
          </table:table-cell>
          <table:table-cell table:style-name="Таблица8.A1" office:value-type="string">
            <text:p text:style-name="P3"/>
          </table:table-cell>
          <table:table-cell table:style-name="Таблица8.A1" office:value-type="string">
            <text:p text:style-name="P3"/>
          </table:table-cell>
        </table:table-row>
      </table:table>
      <text:p text:style-name="P4"/>
      <text:p text:style-name="P14"><text:s text:c="4"/>5. <text:s/>Сведения <text:s/>об <text:s/>изменениях состава, условий размещения и эксплуатации</text:p>
      <text:p text:style-name="P14">защищаемого помещения представлены в таблице 5.</text:p>
      <text:p text:style-name="P14"/>
      <text:p text:style-name="P14"><text:s text:c="66"/>Таблица 5</text:p>
      <text:p text:style-name="P4"/>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C"/>
        <table:table-column table:style-name="Таблица9.F"/>
        <table:table-row>
          <table:table-cell table:style-name="Таблица9.A1" office:value-type="string">
            <text:p text:style-name="P6">N п/п</text:p>
          </table:table-cell>
          <table:table-cell table:style-name="Таблица9.A1" office:value-type="string">
            <text:p text:style-name="P6">Дата внесения изменений</text:p>
          </table:table-cell>
          <table:table-cell table:style-name="Таблица9.A1" office:value-type="string">
            <text:p text:style-name="P6">Наименование документа, на основании которого внесены изменения</text:p>
          </table:table-cell>
          <table:table-cell table:style-name="Таблица9.A1" office:value-type="string">
            <text:p text:style-name="P6">Пункт технического паспорта, в который внесены изменения</text:p>
          </table:table-cell>
          <table:table-cell table:style-name="Таблица9.A1" office:value-type="string">
            <text:p text:style-name="P6">Краткая характеристика изменений</text:p>
          </table:table-cell>
          <table:table-cell table:style-name="Таблица9.A1" office:value-type="string">
            <text:p text:style-name="P6">Подпись лица, внесшего изменения</text:p>
          </table:table-cell>
        </table:table-row>
        <table:table-row>
          <table:table-cell table:style-name="Таблица9.A1" office:value-type="string">
            <text:p text:style-name="P6">1</text:p>
          </table:table-cell>
          <table:table-cell table:style-name="Таблица9.A1" office:value-type="string">
            <text:p text:style-name="P3"/>
          </table:table-cell>
          <table:table-cell table:style-name="Таблица9.A1" office:value-type="string">
            <text:p text:style-name="P3"/>
          </table:table-cell>
          <table:table-cell table:style-name="Таблица9.A1" office:value-type="string">
            <text:p text:style-name="P3"/>
          </table:table-cell>
          <table:table-cell table:style-name="Таблица9.A1" office:value-type="string">
            <text:p text:style-name="P3"/>
          </table:table-cell>
          <table:table-cell table:style-name="Таблица9.A1" office:value-type="string">
            <text:p text:style-name="P3"/>
          </table:table-cell>
        </table:table-row>
        <table:table-row>
          <table:table-cell table:style-name="Таблица9.A1" office:value-type="string">
            <text:p text:style-name="P6">2</text:p>
          </table:table-cell>
          <table:table-cell table:style-name="Таблица9.A1" office:value-type="string">
            <text:p text:style-name="P3"/>
          </table:table-cell>
          <table:table-cell table:style-name="Таблица9.A1" office:value-type="string">
            <text:p text:style-name="P3"/>
          </table:table-cell>
          <table:table-cell table:style-name="Таблица9.A1" office:value-type="string">
            <text:p text:style-name="P3"/>
          </table:table-cell>
          <table:table-cell table:style-name="Таблица9.A1" office:value-type="string">
            <text:p text:style-name="P3"/>
          </table:table-cell>
          <table:table-cell table:style-name="Таблица9.A1" office:value-type="string">
            <text:p text:style-name="P3"/>
          </table:table-cell>
        </table:table-row>
      </table:table>
      <text:p text:style-name="P4"/>
      <text:p text:style-name="P14">Ответственный за эксплуатацию защищаемого помещения</text:p>
      <text:p text:style-name="P14"/>
      <text:p text:style-name="P14">_____________________ <text:s text:c="14"/>_______________________________________</text:p>
      <text:p text:style-name="P14"><text:s text:c="5"/>(должность) <text:s text:c="24"/>(подпись, фамилия и инициалы)</text:p>
      <text:p text:style-name="P14"/>
      <text:p text:style-name="P14">"__" ____________ 20__ г.</text:p>
      <text:p text:style-name="P4"/>
      <text:p text:style-name="P8">--------------------------------</text:p>
      <text:p text:style-name="P10"><text:bookmark text:name="P540"/>&lt;4&gt; В случае отсутствия необходимости специальной проверки технических средств пункт не заполняется.</text:p>
      <text:p text:style-name="P10"><text:bookmark text:name="P541"/>&lt;5&gt; В случае отсутствия необходимости применения сертифицированных средств защиты информации пункт не заполняется.</text:p>
      <text:p text:style-name="P4"/>
      <text:p text:style-name="P4"/>
      <text:p text:style-name="P4"/>
      <text:p text:style-name="P4"/>
      <text:p text:style-name="P4"/>
      <text:h text:style-name="P21" text:outline-level="2">Приложение N 3</text:h>
      <text:p text:style-name="P5">к Порядку организации</text:p>
      <text:p text:style-name="P5">и проведения работ по аттестации</text:p>
      <text:p text:style-name="P5">объектов информатизации на соответствие</text:p>
      <text:p text:style-name="P5">требованиям о защите информации,</text:p>
      <text:p text:style-name="P5">не составляющей государственную тайну,</text:p>
      <text:p text:style-name="P5">утвержденному приказом ФСТЭК России</text:p>
      <text:p text:style-name="P5">от "__" апреля 2021 г. N ___</text:p>
      <text:p text:style-name="P4"/>
      <text:p text:style-name="P14"><text:s text:c="70"/>Форма</text:p>
      <text:p text:style-name="P14"><text:soft-page-break/><text:s text:c="70"/>-----</text:p>
      <text:p text:style-name="P14"/>
      <text:p text:style-name="P14"><text:s text:c="53"/>УТВЕРЖДАЮ</text:p>
      <text:p text:style-name="P14"><text:s text:c="40"/>___________________________________</text:p>
      <text:p text:style-name="P14"><text:s text:c="40"/>(руководитель (уполномоченное лицо)</text:p>
      <text:p text:style-name="P14"><text:s text:c="41"/>владельца объекта информатизации)</text:p>
      <text:p text:style-name="P14"><text:s text:c="40"/>___________________________________</text:p>
      <text:p text:style-name="P14"><text:s text:c="43"/>(подпись, инициалы и фамилия)</text:p>
      <text:p text:style-name="P14"/>
      <text:p text:style-name="P14"><text:s text:c="40"/>"__" ______________________ 20__ г.</text:p>
      <text:p text:style-name="P14"/>
      <text:p text:style-name="P14"><text:bookmark text:name="P568"/><text:s text:c="36"/>АКТ</text:p>
      <text:p text:style-name="P14"><text:s text:c="9"/>классификации информационной (автоматизированной) системы</text:p>
      <text:p text:style-name="P14"><text:s text:c="7"/>____________________________________________________________</text:p>
      <text:p text:style-name="P14"><text:s text:c="8"/>(наименование информационной (автоматизированной) системы)</text:p>
      <text:p text:style-name="P14"/>
      <text:p text:style-name="P14"><text:s text:c="4"/>Комиссия, назначенная приказом _______________________________, провела</text:p>
      <text:p text:style-name="P14">классификацию <text:s text:c="5"/>информационной <text:s text:c="6"/>(автоматизированной) <text:s text:c="7"/>системы</text:p>
      <text:p text:style-name="P14">__________________________________________________________________________.</text:p>
      <text:p text:style-name="P14"><text:s text:c="4"/>Комиссия установила:</text:p>
      <text:p text:style-name="P14"><text:s text:c="4"/>1. Масштаб информационной (автоматизированной) системы _______________.</text:p>
      <text:p text:style-name="P14"><text:s text:c="4"/>2. <text:s text:c="2"/>Уровень <text:s text:c="2"/>значимости <text:s/>информации, <text:s/>содержащейся <text:s/>в <text:s/>информационной</text:p>
      <text:p text:style-name="P14">(автоматизированной) системе _____________________________________________.</text:p>
      <text:p text:style-name="P14"><text:s text:c="4"/>3. Класс защищенности информационной (автоматизированной) системы ____.</text:p>
      <text:p text:style-name="P14"/>
      <text:p text:style-name="P14">Члены комиссии:</text:p>
      <text:p text:style-name="P14"/>
      <text:p text:style-name="P14">_____________________ <text:s text:c="14"/>_______________________________________</text:p>
      <text:p text:style-name="P14"><text:s text:c="10"/>(должность) <text:s text:c="24"/>(подпись, фамилия и инициалы)</text:p>
      <text:p text:style-name="P14"/>
      <text:p text:style-name="P14">_____________________ <text:s text:c="14"/>_______________________________________</text:p>
      <text:p text:style-name="P14"><text:s text:c="10"/>(должность) <text:s text:c="24"/>(подпись, фамилия и инициалы)</text:p>
      <text:p text:style-name="P4"/>
      <text:p text:style-name="P4"/>
      <text:p text:style-name="P4"/>
      <text:p text:style-name="P4"/>
      <text:p text:style-name="P4"/>
      <text:h text:style-name="P21" text:outline-level="2">Приложение N 4</text:h>
      <text:p text:style-name="P5">к Порядку организации</text:p>
      <text:p text:style-name="P5">и проведения работ по аттестации</text:p>
      <text:p text:style-name="P5">объектов информатизации,</text:p>
      <text:p text:style-name="P5">утвержденному приказом ФСТЭК России</text:p>
      <text:p text:style-name="P5">от "__" апреля 2021 г. N ___</text:p>
      <text:p text:style-name="P4"/>
      <text:p text:style-name="P14"><text:s text:c="70"/>Форма</text:p>
      <text:p text:style-name="P14"><text:s text:c="70"/>-----</text:p>
      <text:p text:style-name="P14"/>
      <text:p text:style-name="P14"><text:bookmark text:name="P604"/><text:s text:c="27"/>АТТЕСТАТ СООТВЕТСТВИЯ</text:p>
      <text:p text:style-name="P14"><text:s text:c="21"/>требованиям по защите информации</text:p>
      <text:p text:style-name="P14"><text:s text:c="8"/>N _________________________________________________________</text:p>
      <text:p text:style-name="P14"><text:s text:c="24"/>(номер аттестата соответствия</text:p>
      <text:p text:style-name="P13"><text:span text:style-name="T1"><text:s text:c="23"/>в формате XXXX.XXXXX.XXXX) </text:span><text:span text:style-name="Основной_20_шрифт_20_абзаца"><text:span text:style-name="T1">&lt;6&gt;</text:span></text:span></text:p>
      <text:p text:style-name="P14"/>
      <text:p text:style-name="P14"><text:s text:c="8"/>Выдан: ___________________________________________________.</text:p>
      <text:p text:style-name="P14"><text:s text:c="23"/>(дата выдачи аттестата соответствия)</text:p>
      <text:p text:style-name="P14"/>
      <text:p text:style-name="P14"><text:s text:c="4"/>1. Настоящим АТТЕСТАТОМ удостоверяется, что</text:p>
      <text:p text:style-name="P14">__________________________________________________________________________,</text:p>
      <text:p text:style-name="P14"><text:s text:c="16"/>(наименование объекта информатизации, класс</text:p>
      <text:p text:style-name="P14"><text:s text:c="13"/>защищенности информационной (автоматизированной)</text:p>
      <text:p text:style-name="P14"><text:soft-page-break/><text:s text:c="19"/>системы, категория значимого объекта)</text:p>
      <text:p text:style-name="P14">принадлежащий ____________________________________________________________,</text:p>
      <text:p text:style-name="P14"><text:s text:c="21"/>(наименование владельца объекта информатизации)</text:p>
      <text:p text:style-name="P14">соответствует ____________________________________________________________.</text:p>
      <text:p text:style-name="P14"><text:s text:c="22"/>(наименование требований по защите информации,</text:p>
      <text:p text:style-name="P14"><text:s text:c="21"/>на соответствие которым проводилась аттестация)</text:p>
      <text:p text:style-name="P14"><text:s text:c="4"/>2. <text:s/>Состав программных, программно-технических средств и средств защиты</text:p>
      <text:p text:style-name="P14">информации <text:s text:c="2"/>приведен <text:s/>в <text:s/>техническом <text:s/>паспорте <text:s/>на <text:s/>объект <text:s/>информатизации</text:p>
      <text:p text:style-name="P14">от "__" _________ 20__ г.</text:p>
      <text:p text:style-name="P14"><text:s text:c="4"/>3. Организационные и технические условия, имеющиеся у владельца объекта</text:p>
      <text:p text:style-name="P14">информатизации, <text:s/>обеспечивают поддержку безопасности аттестованного объекта</text:p>
      <text:p text:style-name="P14">информатизации <text:s/>в <text:s/>процессе <text:s/>эксплуатации <text:s/>в соответствии с требованиями по</text:p>
      <text:p text:style-name="P14">защите информации.</text:p>
      <text:p text:style-name="P14"><text:s text:c="4"/>4. <text:s/>Аттестат соответствия выдан на основании результатов аттестационных</text:p>
      <text:p text:style-name="P14">испытаний, проведенных органом по аттестации _____________________________.</text:p>
      <text:p text:style-name="P14"><text:s text:c="50"/>(наименование органа</text:p>
      <text:p text:style-name="P14"><text:s text:c="53"/>по аттестации)</text:p>
      <text:p text:style-name="P14"><text:s text:c="4"/>Аттестация <text:s text:c="2"/>проведена <text:s text:c="2"/>в <text:s text:c="2"/>соответствии <text:s/>с <text:s/>программой <text:s/>и <text:s/>методиками</text:p>
      <text:p text:style-name="P14">аттестационных <text:s text:c="2"/>испытаний, <text:s text:c="3"/>утвержденными <text:s text:c="3"/>органом <text:s text:c="3"/>по <text:s text:c="3"/>аттестации</text:p>
      <text:p text:style-name="P14">___________________________________ от __ __________ 20__ г.</text:p>
      <text:p text:style-name="P14">(наименование органа по аттестации)</text:p>
      <text:p text:style-name="P14"><text:s text:c="4"/>В <text:s text:c="3"/>соответствии <text:s text:c="3"/>с <text:s text:c="3"/>результатами <text:s text:c="2"/>аттестационных <text:s text:c="2"/>испытаний <text:s text:c="2"/>в</text:p>
      <text:p text:style-name="P14">___________________________________________________________________________</text:p>
      <text:p text:style-name="P14"><text:s text:c="19"/>(наименование объекта информатизации)</text:p>
      <text:p text:style-name="P14">разрешается <text:s/>обработка <text:s/>информации, <text:s/>не <text:s/>содержащей <text:s/>сведения, составляющие</text:p>
      <text:p text:style-name="P14">государственную тайну (информации конфиденциального характера).</text:p>
      <text:p text:style-name="P14"><text:s text:c="4"/>5. <text:s/>Результаты <text:s/>аттестационных <text:s/>испытаний <text:s/>приведены <text:s/>в <text:s/>заключении <text:s/>по</text:p>
      <text:p text:style-name="P14">результатам аттестационных испытаний от "__" _________ 20__ г.</text:p>
      <text:p text:style-name="P14"><text:s text:c="4"/>6. <text:s text:c="2"/>При <text:s text:c="2"/>эксплуатации <text:s text:c="2"/>аттестованного <text:s text:c="2"/>объекта <text:s text:c="2"/>информатизации <text:s/>не</text:p>
      <text:p text:style-name="P14">допускается:</text:p>
      <text:p text:style-name="P14"><text:s text:c="4"/>вносить <text:s text:c="2"/>несанкционированные <text:s/>изменения <text:s/>в <text:s/>конфигурацию <text:s/>программных,</text:p>
      <text:p text:style-name="P14">программно-технических средств, средств защиты информации;</text:p>
      <text:p text:style-name="P14"><text:s text:c="4"/>осуществлять <text:s text:c="7"/>несанкционированную <text:s text:c="6"/>замену <text:s text:c="6"/>программных,</text:p>
      <text:p text:style-name="P14">программно-технических <text:s/>средств, <text:s/>средств <text:s/>защиты информации на аналогичные</text:p>
      <text:p text:style-name="P14">средства;</text:p>
      <text:p text:style-name="P14"><text:s text:c="4"/>вносить <text:s/>изменения <text:s/>в <text:s/>архитектуру <text:s/>системы защиты информации, изменять</text:p>
      <text:p text:style-name="P14">состав, структуру системы защиты информации;</text:p>
      <text:p text:style-name="P14"><text:s text:c="4"/>проводить обработку информации в случае приостановки действия аттестата</text:p>
      <text:p text:style-name="P14">соответствия в соответствии с решением ФСТЭК России;</text:p>
      <text:p text:style-name="P14"><text:s text:c="4"/>проводить <text:s/>обработку <text:s/>информации <text:s/>в случае обнаружения неисправностей в</text:p>
      <text:p text:style-name="P14">системе защиты информации объекта информатизации;</text:p>
      <text:p text:style-name="P14"><text:s text:c="4"/>проводить <text:s text:c="2"/>обработку <text:s text:c="2"/>информации <text:s text:c="2"/>в <text:s text:c="2"/>случае <text:s/>обнаружения <text:s/>инцидента</text:p>
      <text:p text:style-name="P14">безопасности.</text:p>
      <text:p text:style-name="P14"><text:s text:c="4"/>7. <text:s/>Контроль <text:s/>за <text:s/>уровнем <text:s/>защиты <text:s/>информации на объекте информатизации</text:p>
      <text:p text:style-name="P14">возлагается на ___________________________________________________________.</text:p>
      <text:p text:style-name="P14"><text:s text:c="21"/>(наименование подразделения (ответственного работника)</text:p>
      <text:p text:style-name="P14"/>
      <text:p text:style-name="P14"><text:s text:c="21"/>Руководитель органа по аттестации</text:p>
      <text:p text:style-name="P14"/>
      <text:p text:style-name="P14"><text:s text:c="2"/>м.п.</text:p>
      <text:p text:style-name="P14"/>
      <text:p text:style-name="P14"><text:s text:c="46"/>_____________________________</text:p>
      <text:p text:style-name="P14"><text:s text:c="46"/>(подпись, фамилия и инициалы)</text:p>
      <text:p text:style-name="P4"/>
      <text:p text:style-name="P8">--------------------------------</text:p>
      <text:p text:style-name="P10"><text:bookmark text:name="P672"/>&lt;6&gt; Первая группа знаков содержит число от 0001 до 9999, указывающие на номер лицензии ФСТЭК России на деятельность по технической защите информации, выданной органу по аттестации. Вторая группа знаков содержит число от 00001 до 99999, указывающее на номер аттестованного объекта информатизации в системе учета органа по аттестации. Третья группа знаков содержит число, указывающее на год выдачи аттестата соответствия.</text:p>
      <text:p text:style-name="P4"><text:soft-page-break/></text:p>
      <text:p text:style-name="P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PT Astra Serif" svg:font-family="'PT Ast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Обычный" style:family="paragraph">
      <style:paragraph-properties fo:hyphenation-ladder-count="no-limit"/>
      <style:text-properties fo:hyphenate="false"/>
    </style:style>
    <style:style style:name="ConsPlusNormal" style:family="paragraph">
      <style:paragraph-properties fo:orphans="0" fo:widows="0" fo:hyphenation-ladder-count="no-limit"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fo:hyphenate="false"/>
    </style:style>
    <style:style style:name="ConsPlusNonformat" style:family="paragraph">
      <style:paragraph-properties fo:orphans="0" fo:widows="0" fo:hyphenation-ladder-count="no-limit" style:text-autospace="none"/>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ConsPlusTitle" style:family="paragraph">
      <style:paragraph-properties fo:orphans="0" fo:widows="0" fo:hyphenation-ladder-count="no-limit" style:text-autospace="non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fo:hyphenate="false"/>
    </style:style>
    <style:style style:name="ConsPlusCell" style:family="paragraph">
      <style:paragraph-properties fo:orphans="0" fo:widows="0" fo:hyphenation-ladder-count="no-limit" style:text-autospace="none"/>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ConsPlusDocList" style:family="paragraph">
      <style:paragraph-properties fo:orphans="0" fo:widows="0" fo:hyphenation-ladder-count="no-limit" style:text-autospace="none"/>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ConsPlusTitlePage" style:family="paragraph">
      <style:paragraph-properties fo:orphans="0" fo:widows="0" fo:hyphenation-ladder-count="no-limit" style:text-autospace="none"/>
      <style:text-properties style:font-name="Tahoma" fo:font-family="Tahoma" style:font-family-generic="swiss" style:font-pitch="variable" fo:font-size="10pt" style:font-size-asian="10pt" style:font-name-complex="Tahoma" style:font-family-complex="Tahoma" style:font-family-generic-complex="swiss" style:font-pitch-complex="variable" fo:hyphenate="false"/>
    </style:style>
    <style:style style:name="ConsPlusJurTerm" style:family="paragraph">
      <style:paragraph-properties fo:orphans="0" fo:widows="0" fo:hyphenation-ladder-count="no-limit" style:text-autospace="none"/>
      <style:text-properties style:font-name="Tahoma" fo:font-family="Tahoma" style:font-family-generic="swiss" style:font-pitch="variable" fo:font-size="13pt" style:font-size-asian="13pt" style:font-name-complex="Tahoma" style:font-family-complex="Tahoma" style:font-family-generic-complex="swiss" style:font-pitch-complex="variable" fo:hyphenate="false"/>
    </style:style>
    <style:style style:name="ConsPlusTextList" style:family="paragraph">
      <style:paragraph-properties fo:orphans="0" fo:widows="0" fo:hyphenation-ladder-count="no-limit"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Table_20_Contents" style:display-name="Table Contents" style:family="paragraph" style:parent-style-name="Standard" style:class="extra">
      <style:paragraph-properties fo:orphans="0" fo:widows="0" text:number-lines="false" text:line-number="0"/>
    </style:style>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1.998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Приказ ФСТЭК России от 29.04.2021 N 77
"Об утверждении Порядка организации и проведения работ по аттестации объектов информатизации на соответствие требованиям о защите информации ограниченного доступа, не составляющей государственную тайну"
(Зарегистрировано в Минюсте России 10.08.2021 N 64589)</dc:title>
    <meta:initial-creator>Алексей Тишуков</meta:initial-creator>
    <meta:creation-date>2023-04-17T10:51:00Z</meta:creation-date>
    <dc:date>2024-02-27T13:05:15.923292523</dc:date>
    <meta:editing-cycles>6</meta:editing-cycles>
    <meta:editing-duration>PT3M16S</meta:editing-duration>
    <meta:document-statistic meta:table-count="7" meta:image-count="0" meta:object-count="0" meta:page-count="19" meta:paragraph-count="519" meta:word-count="6478" meta:character-count="60708" meta:non-whitespace-character-count="50529"/>
    <meta:template xlink:type="simple" xlink:actuate="onRequest" xlink:title="" xlink:href="Normal.dotm"/>
  </office:meta>
</office:document-meta>
</file>